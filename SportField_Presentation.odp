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solid" draw:fill-color="#1b8a5a" draw:opacity="100%" draw:stroke="solid" svg:stroke-width="0.01389in" svg:stroke-color="#1b8a5a" svg:stroke-opacity="100%"/>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6">
      <style:graphic-properties draw:fill="solid" draw:fill-color="#1e3a52" draw:opacity="100%" draw:stroke="solid" svg:stroke-width="0.01389in" svg:stroke-color="#e74c3c" svg:stroke-opacity="100%" draw:shadow="visible" draw:shadow-offset-x="-0.02946in" draw:shadow-offset-y="0.02946in" draw:shadow-color="#000000" draw:shadow-opacity="18%"/>
    </style:style>
    <style:style style:family="graphic" style:name="a467">
      <style:graphic-properties draw:fill="solid" draw:fill-color="#e74c3c" draw:opacity="100%" draw:stroke="solid" svg:stroke-width="0.01389in" svg:stroke-color="#e74c3c" svg:stroke-opacity="100%"/>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782">
      <style:table-properties style:writing-mode="lr-tb"/>
    </style:style>
    <style:style style:family="graphic" style:name="a158">
      <style:graphic-properties draw:fill="solid" draw:fill-color="#1e3a52" draw:opacity="100%" draw:stroke="solid" svg:stroke-width="0.01389in" svg:stroke-color="#1e3a52" svg:stroke-opacity="100%" draw:shadow="visible" draw:shadow-offset-x="-0.02946in" draw:shadow-offset-y="0.02946in" draw:shadow-color="#000000" draw:shadow-opacity="18%"/>
    </style:style>
    <style:style style:family="table-column" style:name="a783">
      <style:table-column-properties style:column-width="2.3in"/>
    </style:style>
    <style:style style:family="graphic" style:name="a159">
      <style:graphic-properties draw:fill="solid" draw:fill-color="#1b8a5a" draw:opacity="100%" draw:stroke="solid" svg:stroke-width="0.01389in" svg:stroke-color="#1b8a5a" svg:stroke-opacity="100%"/>
    </style:style>
    <style:style style:family="table-column" style:name="a784">
      <style:table-column-properties style:column-width="3.2in"/>
    </style:style>
    <style:style style:family="table-column" style:name="a785">
      <style:table-column-properties style:column-width="2.2in"/>
    </style:style>
    <style:style style:family="table-column" style:name="a786">
      <style:table-column-properties style:column-width="1.5in"/>
    </style:style>
    <style:style style:family="table-row" style:name="a787">
      <style:table-row-properties style:row-height="0.56in"/>
    </style:style>
    <style:style style:family="text" style:name="a788">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anguage="en" fo:country="US" fo:font-weight="bold" style:font-weight-asian="bold" style:font-weight-complex="bold"/>
    </style:style>
    <style:style style:family="text" style:name="a789">
      <style:text-properties fo:font-family="Calibri" style:font-family-asian="Calibri" style:font-family-complex="Calibri" fo:font-size="0.15278in" style:font-size-asian="0.15278in" style:font-size-complex="0.15278in" fo:language="en" fo:country="US"/>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6">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margin-left="0in" fo:text-indent="0in"/>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1">
      <style:table-cell-properties style:vertical-align="top" fo:background-color="#1b8a5a"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paragraph" style:name="a167">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anguage="en" fo:country="US" fo:font-weight="bold" style:font-weight-asian="bold" style:font-weight-complex="bold"/>
    </style:style>
    <style:style style:family="text" style:name="a793">
      <style:text-properties fo:font-family="Calibri" style:font-family-asian="Calibri" style:font-family-complex="Calibri" fo:font-size="0.15278in" style:font-size-asian="0.15278in" style:font-size-complex="0.15278in" fo:language="en" fo:country="US"/>
    </style:style>
    <style:style style:family="text" style:name="a169">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margin-left="0in" fo:text-indent="0in"/>
    </style:style>
    <style:style style:family="table-cell" style:name="a795">
      <style:table-cell-properties style:vertical-align="top" fo:background-color="#1b8a5a"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796">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anguage="en" fo:country="US" fo:font-weight="bold" style:font-weight-asian="bold" style:font-weight-complex="bold"/>
    </style:style>
    <style:style style:family="text" style:name="a797">
      <style:text-properties fo:font-family="Calibri" style:font-family-asian="Calibri" style:font-family-complex="Calibri" fo:font-size="0.15278in" style:font-size-asian="0.15278in" style:font-size-complex="0.15278in" fo:language="en" fo:country="US"/>
    </style:style>
    <style:style style:family="paragraph" style:name="a798">
      <style:paragraph-properties fo:margin-left="0in" fo:text-indent="0in"/>
    </style:style>
    <style:style style:family="table-cell" style:name="a799">
      <style:table-cell-properties style:vertical-align="top" fo:background-color="#1b8a5a"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
      <style:drawing-page-properties draw:fill="solid" draw:fill-color="#f4f8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1">
      <style:graphic-properties draw:fill="solid" draw:fill-color="#1b8a5a" draw:opacity="100%" draw:stroke="solid" svg:stroke-width="0.01389in" svg:stroke-color="#1b8a5a" svg:stroke-opacity="100%"/>
    </style:style>
    <style:style style:family="text" style:name="a192">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f39c1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9">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graphic" style:name="a910">
      <style:graphic-properties draw:fill="solid" draw:fill-color="#8e44ad" draw:opacity="100%" draw:stroke="solid" svg:stroke-width="0.01389in" svg:stroke-color="#8e44ad" svg:stroke-opacity="100%"/>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6" style:parent-style-name="Graphics">
      <style:graphic-properties draw:fill="none" draw:stroke="none"/>
    </style:style>
    <style:style style:family="graphic" style:name="a917" style:parent-style-name="Graphics">
      <style:graphic-properties draw:fill="none" draw:stroke="none"/>
    </style:style>
    <style:style style:family="presentation" style:name="a918">
      <style:graphic-properties draw:fill="none" draw:stroke="solid" svg:stroke-width="0.01389in" svg:stroke-color="#000000" svg:stroke-opacity="100%"/>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02">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603">
      <style:graphic-properties draw:fill="solid" draw:fill-color="#e74c3c" draw:opacity="100%" draw:stroke="solid" svg:stroke-width="0.01389in" svg:stroke-color="#e74c3c" svg:stroke-opacity="100%"/>
    </style:style>
    <style:style style:family="text" style:name="a604">
      <style:text-properties fo:font-variant="normal" fo:text-transform="none" fo:color="#e74c3c"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08">
      <style:graphic-properties draw:fill="solid" draw:fill-color="#e74c3c" draw:opacity="15%" draw:stroke="solid" svg:stroke-width="0.01389in" svg:stroke-color="#e74c3c" svg:stroke-opacity="100%"/>
    </style:style>
    <style:style style:family="text" style:name="a609">
      <style:text-properties fo:font-variant="normal" fo:text-transform="none" fo:color="#e74c3c"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6">
      <style:drawing-page-properties draw:fill="solid" draw:fill-color="#f4f8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27">
      <style:graphic-properties draw:fill="solid" draw:fill-color="#1b8a5a" draw:opacity="100%" draw:stroke="solid" svg:stroke-width="0.01389in" svg:stroke-color="#1b8a5a" svg:stroke-opacity="100%"/>
    </style:style>
    <style:style style:family="text" style:name="a928">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17">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618">
      <style:graphic-properties draw:fill="solid" draw:fill-color="#d35400" draw:opacity="100%" draw:stroke="solid" svg:stroke-width="0.01389in" svg:stroke-color="#d35400" svg:stroke-opacity="100%"/>
    </style:style>
    <style:style style:family="text" style:name="a619">
      <style:text-properties fo:font-variant="normal" fo:text-transform="none" fo:color="#d35400"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
      <style:text-properties fo:font-variant="normal" fo:text-transform="none" fo:color="#1b8a5a"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36">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937">
      <style:graphic-properties draw:fill="solid" draw:fill-color="#1b8a5a" draw:opacity="100%" draw:stroke="solid" svg:stroke-width="0.01389in" svg:stroke-color="#1b8a5a" svg:stroke-opacity="100%"/>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23">
      <style:graphic-properties draw:fill="solid" draw:fill-color="#d35400" draw:opacity="15%" draw:stroke="solid" svg:stroke-width="0.01389in" svg:stroke-color="#d35400" svg:stroke-opacity="100%"/>
    </style:style>
    <style:style style:family="text" style:name="a624">
      <style:text-properties fo:font-variant="normal" fo:text-transform="none" fo:color="#d354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14">
      <style:graphic-properties draw:fill="solid" draw:fill-color="#1e3a52" draw:opacity="100%" draw:stroke="solid" svg:stroke-width="0.01389in" svg:stroke-color="#2980b9" svg:stroke-opacity="100%" draw:shadow="visible" draw:shadow-offset-x="-0.02946in" draw:shadow-offset-y="0.02946in" draw:shadow-color="#000000" draw:shadow-opacity="18%"/>
    </style:style>
    <style:style style:family="graphic" style:name="a315">
      <style:graphic-properties draw:fill="solid" draw:fill-color="#2980b9" draw:opacity="100%" draw:stroke="solid" svg:stroke-width="0.01389in" svg:stroke-color="#2980b9" svg:stroke-opacity="100%"/>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32">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633">
      <style:graphic-properties draw:fill="solid" draw:fill-color="#27ae60" draw:opacity="100%" draw:stroke="solid" svg:stroke-width="0.01389in" svg:stroke-color="#27ae60" svg:stroke-opacity="100%"/>
    </style:style>
    <style:style style:family="text" style:name="a634">
      <style:text-properties fo:font-variant="normal" fo:text-transform="none" fo:color="#27ae60"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38">
      <style:graphic-properties draw:fill="solid" draw:fill-color="#27ae60" draw:opacity="15%" draw:stroke="solid" svg:stroke-width="0.01389in" svg:stroke-color="#27ae60" svg:stroke-opacity="100%"/>
    </style:style>
    <style:style style:family="text" style:name="a639">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2980b9"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3">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35">
      <style:graphic-properties draw:fill="none" draw:stroke="dash" draw:stroke-dash="a334" svg:stroke-width="0.02778in" svg:stroke-color="#2ecc71" svg:stroke-opacity="100%"/>
    </style:style>
    <style:style style:family="text" style:name="a960">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dash" draw:stroke-dash="a336" svg:stroke-width="0.02778in" svg:stroke-color="#2ecc71" svg:stroke-opacity="100%"/>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2ecc7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5">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56">
      <style:graphic-properties draw:fill="solid" draw:fill-color="#1b8a5a" draw:opacity="100%" draw:stroke="solid" svg:stroke-width="0.01389in" svg:stroke-color="#1b8a5a" svg:stroke-opacity="100%"/>
    </style:style>
    <style:style style:family="text" style:name="a657">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42">
      <style:text-properties fo:font-variant="normal" fo:text-transform="none" fo:color="#2ecc7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draw:fill="none" draw:stroke="solid" svg:stroke-width="0.01389in" svg:stroke-color="#000000" svg:stroke-opacity="100%"/>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4">
      <style:graphic-properties draw:fill="solid" draw:fill-color="#e67e22" draw:opacity="100%" draw:stroke="solid" svg:stroke-width="0.01389in" svg:stroke-color="#e67e22" svg:stroke-opacity="100%"/>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65">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4">
      <style:drawing-page-properties draw:fill="solid" draw:fill-color="#f4f8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55">
      <style:graphic-properties draw:fill="solid" draw:fill-color="#1b8a5a" draw:opacity="100%" draw:stroke="solid" svg:stroke-width="0.01389in" svg:stroke-color="#1b8a5a" svg:stroke-opacity="100%"/>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365">
      <style:graphic-properties draw:fill="solid" draw:fill-color="#8e44ad" draw:opacity="100%" draw:stroke="solid" svg:stroke-width="0.01389in" svg:stroke-color="#8e44ad" svg:stroke-opacity="100%"/>
    </style:style>
    <style:style style:family="text" style:name="a990">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4">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81">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7">
      <style:graphic-properties draw:fill="solid" draw:fill-color="#8e44ad" draw:opacity="15%" draw:stroke="solid" svg:stroke-width="0.01389in" svg:stroke-color="#8e44ad" svg:stroke-opacity="100%"/>
    </style:style>
    <style:style style:family="text" style:name="a378">
      <style:text-properties fo:font-variant="normal" fo:text-transform="none" fo:color="#8e44a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97">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82">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383">
      <style:graphic-properties draw:fill="solid" draw:fill-color="#2980b9" draw:opacity="100%" draw:stroke="solid" svg:stroke-width="0.01389in" svg:stroke-color="#2980b9" svg:stroke-opacity="100%"/>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8">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draw:fill="solid" draw:fill-color="#2980b9" draw:opacity="15%" draw:stroke="solid" svg:stroke-width="0.01389in" svg:stroke-color="#2980b9" svg:stroke-opacity="100%"/>
    </style:style>
    <style:style style:family="text" style:name="a399">
      <style:text-properties fo:font-variant="normal" fo:text-transform="none" fo:color="#2980b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375in" fo:margin-right="0in" fo:text-indent="-0.37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draw:fill="none" draw:stroke="solid" svg:stroke-width="0.01389in" svg:stroke-color="#000000" svg:stroke-opacity="100%"/>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anguage="en" fo:country="US" fo:font-weight="bold" style:font-weight-asian="bold" style:font-weight-complex="bold"/>
    </style:style>
    <style:style style:family="drawing-page" style:name="a1018">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family="Calibri" style:font-family-asian="Calibri" style:font-family-complex="Calibri" fo:font-size="0.15278in" style:font-size-asian="0.15278in" style:font-size-complex="0.15278in" fo:language="en" fo:country="US"/>
    </style:style>
    <style:style style:family="graphic" style:name="a1019">
      <style:graphic-properties draw:fill="solid" draw:fill-color="#1b8a5a" draw:opacity="100%" draw:stroke="solid" svg:stroke-width="0.01389in" svg:stroke-color="#1b8a5a" svg:stroke-opacity="100%"/>
    </style:style>
    <style:style style:family="paragraph" style:name="a802">
      <style:paragraph-properties fo:margin-left="0in" fo:text-indent="0in"/>
    </style:style>
    <style:style style:family="table-cell" style:name="a803">
      <style:table-cell-properties style:vertical-align="top" fo:background-color="#1b8a5a"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able-row" style:name="a804">
      <style:table-row-properties style:row-height="0.56in"/>
    </style:style>
    <style:style style:family="text" style:name="a805">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06">
      <style:text-properties fo:font-family="Calibri" style:font-family-asian="Calibri" style:font-family-complex="Calibri" fo:font-size="0.14583in" style:font-size-asian="0.14583in" style:font-size-complex="0.14583in" fo:language="en" fo:country="US"/>
    </style:style>
    <style:style style:family="paragraph" style:name="a807">
      <style:paragraph-properties fo:margin-left="0in" fo:text-indent="0in"/>
    </style:style>
    <style:style style:family="table-cell" style:name="a808">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09">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graphic" style:name="a1020">
      <style:graphic-properties draw:fill="solid" draw:fill-color="#27ae60" draw:opacity="30%" draw:stroke="solid" svg:stroke-width="0.01389in" svg:stroke-color="#27ae60" svg:stroke-opacity="40%"/>
    </style:style>
    <style:style style:family="graphic" style:name="a1021">
      <style:graphic-properties draw:fill="solid" draw:fill-color="#ffffff" draw:opacity="12%" draw:stroke="solid" svg:stroke-width="0.01389in" svg:stroke-color="#ffffff" svg:stroke-opacity="25%"/>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72222in" style:font-size-asian="0.72222in" style:font-size-complex="0.72222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72222in" style:font-size-asian="0.72222in" style:font-size-complex="0.72222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family="Calibri" style:font-family-asian="Calibri" style:font-family-complex="Calibri" fo:font-size="0.14583in" style:font-size-asian="0.14583in" style:font-size-complex="0.14583in" fo:language="en" fo:country="US"/>
    </style:style>
    <style:style style:family="graphic" style:name="a10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1">
      <style:paragraph-properties fo:margin-left="0in" fo:text-indent="0in"/>
    </style:style>
    <style:style style:family="text" style:name="a1029">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2">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13">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14">
      <style:text-properties fo:font-family="Calibri" style:font-family-asian="Calibri" style:font-family-complex="Calibri" fo:font-size="0.14583in" style:font-size-asian="0.14583in" style:font-size-complex="0.14583in" fo:language="en" fo:country="US"/>
    </style:style>
    <style:style style:family="paragraph" style:name="a815">
      <style:paragraph-properties fo:margin-left="0in" fo:text-indent="0in"/>
    </style:style>
    <style:style style:family="table-cell" style:name="a816">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17">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18">
      <style:text-properties fo:font-family="Calibri" style:font-family-asian="Calibri" style:font-family-complex="Calibri" fo:font-size="0.14583in" style:font-size-asian="0.14583in" style:font-size-complex="0.14583in" fo:language="en" fo:country="US"/>
    </style:style>
    <style:style style:family="paragraph" style:name="a819">
      <style:paragraph-properties fo:margin-left="0in" fo:text-indent="0in"/>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2">
      <style:graphic-properties draw:fill="solid" draw:fill-color="#f39c12" draw:opacity="100%" draw:stroke="solid" svg:stroke-width="0.01389in" svg:stroke-color="#f39c12" svg:stroke-opacity="100%"/>
    </style:style>
    <style:style style:family="text" style:name="a503">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07">
      <style:graphic-properties draw:fill="solid" draw:fill-color="#1e3a52" draw:opacity="100%" draw:stroke="solid" svg:stroke-width="0.01389in" svg:stroke-color="#1b8a5a" svg:stroke-opacity="100%" draw:shadow="visible" draw:shadow-offset-x="-0.02946in" draw:shadow-offset-y="0.02946in" draw:shadow-color="#000000" draw:shadow-opacity="18%"/>
    </style:style>
    <style:style style:family="graphic" style:name="a508">
      <style:graphic-properties draw:fill="solid" draw:fill-color="#1b8a5a" draw:opacity="100%" draw:stroke="solid" svg:stroke-width="0.01389in" svg:stroke-color="#1b8a5a" svg:stroke-opacity="100%"/>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2">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0">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21">
      <style:table-row-properties style:row-height="0.56in"/>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23">
      <style:text-properties fo:font-family="Calibri" style:font-family-asian="Calibri" style:font-family-complex="Calibri" fo:font-size="0.14583in" style:font-size-asian="0.14583in" style:font-size-complex="0.14583in" fo:language="en" fo:country="US"/>
    </style:style>
    <style:style style:family="paragraph" style:name="a824">
      <style:paragraph-properties fo:margin-left="0in" fo:text-indent="0in"/>
    </style:style>
    <style:style style:family="table-cell" style:name="a825">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26">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27">
      <style:text-properties fo:font-family="Calibri" style:font-family-asian="Calibri" style:font-family-complex="Calibri" fo:font-size="0.14583in" style:font-size-asian="0.14583in" style:font-size-complex="0.14583in" fo:language="en" fo:country="US"/>
    </style:style>
    <style:style style:family="paragraph" style:name="a828">
      <style:paragraph-properties fo:margin-left="0in" fo:text-indent="0in"/>
    </style:style>
    <style:style style:family="table-cell" style:name="a829">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10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solid" draw:fill-color="#2ecc71" draw:opacity="100%" draw:stroke="solid" svg:stroke-width="0.01389in" svg:stroke-color="#2ecc71" svg:stroke-opacity="100%"/>
    </style:style>
    <style:style style:family="graphic" style:name="a1043">
      <style:graphic-properties draw:fill="solid" draw:fill-color="#1e3a52" draw:opacity="100%" draw:stroke="solid" svg:stroke-width="0.01389in" svg:stroke-color="#1b8a5a" svg:stroke-opacity="100%" draw:shadow="visible" draw:shadow-offset-x="-0.02946in" draw:shadow-offset-y="0.02946in" draw:shadow-color="#000000" draw:shadow-opacity="18%"/>
    </style:style>
    <style:style style:family="graphic" style:name="a202">
      <style:graphic-properties draw:fill="solid" draw:fill-color="#e8f5ee" draw:opacity="100%" draw:stroke="solid" svg:stroke-width="0.01389in" svg:stroke-color="#2ecc71" svg:stroke-opacity="100%"/>
    </style:style>
    <style:style style:family="text" style:name="a1044">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0">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graphic" style:name="a10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family="Calibri" style:font-family-asian="Calibri" style:font-family-complex="Calibri" fo:font-size="0.14583in" style:font-size-asian="0.14583in" style:font-size-complex="0.14583in" fo:language="en" fo:country="US"/>
    </style:style>
    <style:style style:family="text" style:name="a1048">
      <style:text-properties fo:font-variant="normal" fo:text-transform="none" fo:color="#a8c5b5"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margin-left="0in" fo:text-indent="0in"/>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3">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graphic" style:name="a2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4">
      <style:text-properties fo:color="#1b8a5a" fo:font-family="Calibri" style:font-family-asian="Calibri" style:font-family-complex="Calibri" fo:font-size="0.14583in" style:font-size-asian="0.14583in" style:font-size-complex="0.14583in" fo:language="en" fo:country="US" fo:font-weight="bold" style:font-weight-asian="bold" style:font-weight-complex="bold"/>
    </style:style>
    <style:style style:family="text" style:name="a835">
      <style:text-properties fo:font-family="Calibri" style:font-family-asian="Calibri" style:font-family-complex="Calibri" fo:font-size="0.14583in" style:font-size-asian="0.14583in" style:font-size-complex="0.14583in" fo:language="en" fo:country="US"/>
    </style:style>
    <style:style style:family="paragraph" style:name="a836">
      <style:paragraph-properties fo:margin-left="0in" fo:text-indent="0in"/>
    </style:style>
    <style:style style:family="table-cell" style:name="a837">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able-row" style:name="a838">
      <style:table-row-properties style:row-height="0.56in"/>
    </style:style>
    <style:style style:family="text" style:name="a839">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0">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solid" draw:fill-color="#1e3a52" draw:opacity="100%" draw:stroke="solid" svg:stroke-width="0.01389in" svg:stroke-color="#1b8a5a" svg:stroke-opacity="100%" draw:shadow="visible" draw:shadow-offset-x="-0.02946in" draw:shadow-offset-y="0.02946in" draw:shadow-color="#000000" draw:shadow-opacity="18%"/>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family="Calibri" style:font-family-asian="Calibri" style:font-family-complex="Calibri" fo:font-size="0.14583in" style:font-size-asian="0.14583in" style:font-size-complex="0.14583in" fo:language="en" fo:country="US"/>
    </style:style>
    <style:style style:family="text" style:name="a1057">
      <style:text-properties fo:font-variant="normal" fo:text-transform="none" fo:color="#a8c5b5"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margin-left="0in" fo:text-indent="0in"/>
    </style:style>
    <style:style style:family="table-cell" style:name="a842">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family="Calibri" style:font-family-asian="Calibri" style:font-family-complex="Calibri" fo:font-size="0.14583in" style:font-size-asian="0.14583in" style:font-size-complex="0.14583in" fo:language="en" fo:country="US"/>
    </style:style>
    <style:style style:family="paragraph" style:name="a845">
      <style:paragraph-properties fo:margin-left="0in" fo:text-indent="0in"/>
    </style:style>
    <style:style style:family="table-cell" style:name="a846">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47">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48">
      <style:text-properties fo:font-family="Calibri" style:font-family-asian="Calibri" style:font-family-complex="Calibri" fo:font-size="0.14583in" style:font-size-asian="0.14583in" style:font-size-complex="0.14583in" fo:language="en" fo:country="US"/>
    </style:style>
    <style:style style:family="paragraph" style:name="a849">
      <style:paragraph-properties fo:margin-left="0in" fo:text-indent="0in"/>
    </style:style>
    <style:style style:family="text" style:name="a530">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draw:fill="none" draw:stroke="solid" svg:stroke-width="0.01389in" svg:stroke-color="#000000" svg:stroke-opacity="100%"/>
    </style:style>
    <style:style style:family="graphic" style:name="a10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61">
      <style:graphic-properties draw:fill="solid" draw:fill-color="#1e3a52" draw:opacity="100%" draw:stroke="solid" svg:stroke-width="0.01389in" svg:stroke-color="#1b8a5a" svg:stroke-opacity="100%" draw:shadow="visible" draw:shadow-offset-x="-0.02946in" draw:shadow-offset-y="0.02946in" draw:shadow-color="#000000" draw:shadow-opacity="18%"/>
    </style:style>
    <style:style style:family="paragraph" style:name="a220">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a8c5b5"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0">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graphic" style:name="a227">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10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2">
      <style:text-properties fo:font-family="Calibri" style:font-family-asian="Calibri" style:font-family-complex="Calibri" fo:font-size="0.14583in" style:font-size-asian="0.14583in" style:font-size-complex="0.14583in" fo:language="en" fo:country="US"/>
    </style:style>
    <style:style style:family="graphic" style:name="a228">
      <style:graphic-properties draw:fill="solid" draw:fill-color="#0f1f2e" draw:opacity="100%" draw:stroke="solid" svg:stroke-width="0.01389in" svg:stroke-color="#0f1f2e" svg:stroke-opacity="100%"/>
    </style:style>
    <style:style style:family="paragraph" style:name="a853">
      <style:paragraph-properties fo:margin-left="0in" fo:text-indent="0in"/>
    </style:style>
    <style:style style:family="graphic" style:name="a229">
      <style:graphic-properties draw:fill="solid" draw:fill-color="#ebf0f5" draw:opacity="100%" draw:stroke="solid" svg:stroke-width="0.01389in" svg:stroke-color="#0f1f2e" svg:stroke-opacity="100%"/>
    </style:style>
    <style:style style:family="table-cell" style:name="a854">
      <style:table-cell-properties style:vertical-align="top" fo:background-color="#ffffff"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able-row" style:name="a855">
      <style:table-row-properties style:row-height="0.56in"/>
    </style:style>
    <style:style style:family="text" style:name="a856">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57">
      <style:text-properties fo:font-family="Calibri" style:font-family-asian="Calibri" style:font-family-complex="Calibri" fo:font-size="0.14583in" style:font-size-asian="0.14583in" style:font-size-complex="0.14583in" fo:language="en" fo:country="US"/>
    </style:style>
    <style:style style:family="paragraph" style:name="a858">
      <style:paragraph-properties fo:margin-left="0in" fo:text-indent="0in"/>
    </style:style>
    <style:style style:family="table-cell" style:name="a859">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solid" draw:fill-color="#f4f8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48">
      <style:graphic-properties draw:fill="solid" draw:fill-color="#1b8a5a" draw:opacity="100%" draw:stroke="solid" svg:stroke-width="0.01389in" svg:stroke-color="#1b8a5a" svg:stroke-opacity="100%"/>
    </style:style>
    <style:style style:family="text" style:name="a549">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a8c5b5"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draw:fill="none" draw:stroke="solid" svg:stroke-width="0.01389in" svg:stroke-color="#000000" svg:stroke-opacity="100%"/>
    </style:style>
    <style:style style:family="graphic" style:name="a2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family="Calibri" style:font-family-asian="Calibri" style:font-family-complex="Calibri" fo:font-size="0.14583in" style:font-size-asian="0.14583in" style:font-size-complex="0.14583in" fo:language="en" fo:country="US"/>
    </style:style>
    <style:style style:family="graphic" style:name="a2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margin-left="0in" fo:text-indent="0in"/>
    </style:style>
    <style:style style:family="text" style:name="a238">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3">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65">
      <style:text-properties fo:font-family="Calibri" style:font-family-asian="Calibri" style:font-family-complex="Calibri" fo:font-size="0.14583in" style:font-size-asian="0.14583in" style:font-size-complex="0.14583in" fo:language="en" fo:country="US"/>
    </style:style>
    <style:style style:family="paragraph" style:name="a866">
      <style:paragraph-properties fo:margin-left="0in" fo:text-indent="0in"/>
    </style:style>
    <style:style style:family="table-cell" style:name="a867">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868">
      <style:text-properties fo:color="#333333"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anguage="en" fo:country="US"/>
    </style:style>
    <style:style style:family="text" style:name="a869">
      <style:text-properties fo:font-family="Calibri" style:font-family-asian="Calibri" style:font-family-complex="Calibri" fo:font-size="0.14583in" style:font-size-asian="0.14583in" style:font-size-complex="0.14583in" fo:language="en" fo:country="US"/>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f1f2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57">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558">
      <style:graphic-properties draw:fill="solid" draw:fill-color="#1b8a5a" draw:opacity="100%" draw:stroke="solid" svg:stroke-width="0.01389in" svg:stroke-color="#1b8a5a" svg:stroke-opacity="100%"/>
    </style:style>
    <style:style style:family="text" style:name="a559">
      <style:text-properties fo:font-variant="normal" fo:text-transform="none" fo:color="#1b8a5a"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0">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margin-left="0in" fo:text-indent="0in"/>
    </style:style>
    <style:style style:family="text" style:name="a246">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1">
      <style:table-cell-properties style:vertical-align="top" fo:background-color="#eaf5ee" fo:border-top="0.01389in solid #d0e8da" fo:border-bottom="0.01389in solid #d0e8da" fo:border-left="0.01389in solid #d0e8da" fo:border-right="0.01389in solid #d0e8da" fo:padding-top="0.05in" fo:padding-bottom="0.05in" fo:padding-left="0.1in" fo:padding-right="0.1in"/>
      <style:paragraph-properties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none" draw:stroke="solid" svg:stroke-width="0.01389in" svg:stroke-color="#000000" svg:stroke-opacity="100%"/>
    </style:style>
    <style:style style:family="paragraph" style:name="a248">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63">
      <style:graphic-properties draw:fill="solid" draw:fill-color="#1b8a5a" draw:opacity="15%" draw:stroke="solid" svg:stroke-width="0.01389in" svg:stroke-color="#1b8a5a" svg:stroke-opacity="100%"/>
    </style:style>
    <style:style style:family="text" style:name="a564">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334d3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5" style:parent-style-name="Graphics">
      <style:graphic-properties draw:fill="none" draw:stroke="none"/>
    </style:style>
    <style:style style:family="drawing-page" style:name="a880">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56">
      <style:graphic-properties draw:fill="none" draw:stroke="solid" svg:stroke-width="0.01389in" svg:stroke-color="#000000" svg:stroke-opacity="100%"/>
    </style:style>
    <style:style style:family="graphic" style:name="a881">
      <style:graphic-properties draw:fill="solid" draw:fill-color="#1b8a5a" draw:opacity="100%" draw:stroke="solid" svg:stroke-width="0.01389in" svg:stroke-color="#1b8a5a" svg:stroke-opacity="100%"/>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573">
      <style:graphic-properties draw:fill="solid" draw:fill-color="#2980b9" draw:opacity="100%" draw:stroke="solid" svg:stroke-width="0.01389in" svg:stroke-color="#2980b9" svg:stroke-opacity="100%"/>
    </style:style>
    <style:style style:family="text" style:name="a574">
      <style:text-properties fo:font-variant="normal" fo:text-transform="none" fo:color="#2980b9"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78">
      <style:graphic-properties draw:fill="solid" draw:fill-color="#2980b9" draw:opacity="15%" draw:stroke="solid" svg:stroke-width="0.01389in" svg:stroke-color="#2980b9" svg:stroke-opacity="100%"/>
    </style:style>
    <style:style style:family="text" style:name="a579">
      <style:text-properties fo:font-variant="normal" fo:text-transform="none" fo:color="#2980b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4">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65">
      <style:graphic-properties draw:fill="solid" draw:fill-color="#1b8a5a" draw:opacity="100%" draw:stroke="solid" svg:stroke-width="0.01389in" svg:stroke-color="#1b8a5a" svg:stroke-opacity="100%"/>
    </style:style>
    <style:style style:family="graphic" style:name="a890">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266">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1">
      <style:graphic-properties draw:fill="solid" draw:fill-color="#2980b9" draw:opacity="100%" draw:stroke="solid" svg:stroke-width="0.01389in" svg:stroke-color="#2980b9"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7">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87">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588">
      <style:graphic-properties draw:fill="solid" draw:fill-color="#8e44ad" draw:opacity="100%" draw:stroke="solid" svg:stroke-width="0.01389in" svg:stroke-color="#8e44ad" svg:stroke-opacity="100%"/>
    </style:style>
    <style:style style:family="text" style:name="a589">
      <style:text-properties fo:font-variant="normal" fo:text-transform="none" fo:color="#8e44ad"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74">
      <style:graphic-properties draw:fill="solid" draw:fill-color="#1e3a52" draw:opacity="100%" draw:stroke="solid" svg:stroke-width="0.01389in" svg:stroke-color="#e74c3c" svg:stroke-opacity="100%" draw:shadow="visible" draw:shadow-offset-x="-0.02946in" draw:shadow-offset-y="0.02946in" draw:shadow-color="#000000" draw:shadow-opacity="18%"/>
    </style:style>
    <style:style style:family="graphic" style:name="a275">
      <style:graphic-properties draw:fill="solid" draw:fill-color="#e74c3c" draw:opacity="100%" draw:stroke="solid" svg:stroke-width="0.01389in" svg:stroke-color="#e74c3c" svg:stroke-opacity="100%"/>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93">
      <style:graphic-properties draw:fill="solid" draw:fill-color="#8e44ad" draw:opacity="15%" draw:stroke="solid" svg:stroke-width="0.01389in" svg:stroke-color="#8e44ad" svg:stroke-opacity="100%"/>
    </style:style>
    <style:style style:family="text" style:name="a594">
      <style:text-properties fo:font-variant="normal" fo:text-transform="none" fo:color="#8e44a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8">
      <style:text-properties fo:font-variant="normal" fo:text-transform="none" fo:color="#44444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e74c3c"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e8f5e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94">
      <style:graphic-properties draw:fill="solid" draw:fill-color="#1e3a52" draw:opacity="100%" draw:stroke="solid" svg:stroke-width="0.01389in" svg:stroke-color="#1b8a5a" svg:stroke-opacity="100%" draw:shadow="visible" draw:shadow-offset-x="-0.02946in" draw:shadow-offset-y="0.02946in" draw:shadow-color="#000000" draw:shadow-opacity="18%"/>
    </style:style>
    <style:style style:family="graphic" style:name="a295">
      <style:graphic-properties draw:fill="solid" draw:fill-color="#1b8a5a" draw:opacity="100%" draw:stroke="solid" svg:stroke-width="0.01389in" svg:stroke-color="#1b8a5a" svg:stroke-opacity="100%"/>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4">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5">
      <style:graphic-properties draw:fill="solid" draw:fill-color="#1b8a5a" draw:opacity="100%" draw:stroke="solid" svg:stroke-width="0.01389in" svg:stroke-color="#1b8a5a" svg:stroke-opacity="100%"/>
    </style:style>
    <style:style style:family="graphic" style:name="a66">
      <style:graphic-properties draw:fill="solid" draw:fill-color="#1b8a5a" draw:opacity="30%" draw:stroke="solid" svg:stroke-width="0.01389in" svg:stroke-color="#1b8a5a" svg:stroke-opacity="30%"/>
    </style:style>
    <style:style style:family="graphic" style:name="a67">
      <style:graphic-properties draw:fill="solid" draw:fill-color="#27ae60" draw:opacity="20%" draw:stroke="solid" svg:stroke-width="0.01389in" svg:stroke-color="#2ecc71" svg:stroke-opacity="40%"/>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in" style:font-size-asian="1in" style:font-size-complex="1in" fo:letter-spacing="0.1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1">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6">
      <style:graphic-properties draw:fill="solid" draw:fill-color="#1b8a5a" draw:opacity="100%" draw:stroke="solid" svg:stroke-width="0.01389in" svg:stroke-color="#1b8a5a" svg:stroke-opacity="100%"/>
    </style:style>
    <style:style style:family="graphic" style:name="a77">
      <style:graphic-properties draw:fill="solid" draw:fill-color="#1e3a52" draw:opacity="100%" draw:stroke="solid" svg:stroke-width="0.01389in" svg:stroke-color="#1b8a5a" svg:stroke-opacity="100%"/>
    </style:style>
    <style:style style:family="text" style:name="a78">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13">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2">
      <style:graphic-properties draw:fill="solid" draw:fill-color="#1e3a52" draw:opacity="100%" draw:stroke="solid" svg:stroke-width="0.01389in" svg:stroke-color="#1b8a5a" svg:stroke-opacity="100%"/>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2980b9" style:text-line-through-type="none" style:text-line-through-style="none" style:text-line-through-width="auto" style:text-line-through-color="font-color" style:text-position="0% 100%" fo:font-family="Calibri" style:font-family-asian="Calibri" style:font-family-complex="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2980b9" style:text-line-through-type="none" style:text-line-through-style="none" style:text-line-through-width="auto" style:text-line-through-color="font-color" style:text-position="0% 100%" fo:font-family="Calibri" style:font-family-asian="Calibri" style:font-family-complex="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draw:fill="solid" draw:fill-color="#1e3a52" draw:opacity="100%" draw:stroke="solid" svg:stroke-width="0.01389in" svg:stroke-color="#1b8a5a" svg:stroke-opacity="100%"/>
    </style:style>
    <style:style style:family="graphic" style:name="a4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6">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draw:fill="solid" draw:fill-color="#1b8a5a" draw:opacity="100%" draw:stroke="solid" svg:stroke-width="0.01389in" svg:stroke-color="#1b8a5a" svg:stroke-opacity="100%"/>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2">
      <style:graphic-properties draw:fill="solid" draw:fill-color="#1e3a52" draw:opacity="100%" draw:stroke="solid" svg:stroke-width="0.01389in" svg:stroke-color="#1b8a5a"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a8c5b5"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 style:parent-style-name="Graphics">
      <style:graphic-properties draw:fill="none" draw:stroke="none"/>
    </style:style>
    <style:style style:family="text" style:name="a733">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
      <style:graphic-properties draw:fill="solid" draw:fill-color="#1b8a5a" draw:opacity="100%" draw:stroke="solid" svg:stroke-width="0.01389in" svg:stroke-color="#1b8a5a" svg:stroke-opacity="100%"/>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solid" draw:fill-color="#1b8a5a" draw:opacity="15%" draw:stroke="solid" svg:stroke-width="0.01389in" svg:stroke-color="#1b8a5a" svg:stroke-opacity="100%"/>
    </style:style>
    <style:style style:family="text" style:name="a421">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1b8a5a" style:text-line-through-type="none" style:text-line-through-style="none" style:text-line-through-width="auto" style:text-line-through-color="font-color" style:text-position="0% 100%" fo:font-family="Calibri" style:font-family-asian="Calibri" style:font-family-complex="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26">
      <style:graphic-properties draw:fill="solid" draw:fill-color="#ffffff" draw:opacity="100%" draw:stroke="solid" svg:stroke-width="0.01389in" svg:stroke-color="#d0e8da" svg:stroke-opacity="100%" draw:shadow="visible" draw:shadow-offset-x="-0.02946in" draw:shadow-offset-y="0.02946in" draw:shadow-color="#000000" draw:shadow-opacity="18%"/>
    </style:style>
    <style:style style:family="graphic" style:name="a427">
      <style:graphic-properties draw:fill="solid" draw:fill-color="#e74c3c" draw:opacity="100%" draw:stroke="solid" svg:stroke-width="0.01389in" svg:stroke-color="#e74c3c" svg:stroke-opacity="100%"/>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45">
      <style:graphic-properties draw:fill="solid" draw:fill-color="#1e3a52" draw:opacity="100%" draw:stroke="solid" svg:stroke-width="0.01389in" svg:stroke-color="#2a4a6a" svg:stroke-opacity="100%" draw:shadow="visible" draw:shadow-offset-x="-0.02946in" draw:shadow-offset-y="0.02946in" draw:shadow-color="#000000" draw:shadow-opacity="18%"/>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9">
      <style:text-properties fo:font-variant="normal" fo:text-transform="none" fo:color="#2ecc71"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2">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333333"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3">
      <style:graphic-properties draw:fill="solid" draw:fill-color="#1b8a5a" draw:opacity="100%" draw:stroke="solid" svg:stroke-width="0.01389in" svg:stroke-color="#1b8a5a" svg:stroke-opacity="100%"/>
    </style:style>
    <style:style style:family="text" style:name="a124">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a8c5b5"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2">
      <style:graphic-properties draw:fill="solid" draw:fill-color="#e74c3c" draw:opacity="15%" draw:stroke="solid" svg:stroke-width="0.01389in" svg:stroke-color="#e74c3c" svg:stroke-opacity="100%"/>
    </style:style>
    <style:style style:family="text" style:name="a443">
      <style:text-properties fo:font-variant="normal" fo:text-transform="none" fo:color="#e74c3c"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47">
      <style:graphic-properties draw:fill="none" draw:stroke="solid" svg:stroke-width="0.01389in" svg:stroke-color="#aaaaaa" svg:stroke-opacity="100%"/>
    </style:style>
    <style:style style:family="presentation" style:name="a448">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draw:fill="solid" draw:fill-color="#1e3a52" draw:opacity="100%" draw:stroke="solid" svg:stroke-width="0.01389in" svg:stroke-color="#1e3a52" svg:stroke-opacity="100%" draw:shadow="visible" draw:shadow-offset-x="-0.02946in" draw:shadow-offset-y="0.02946in" draw:shadow-color="#000000" draw:shadow-opacity="18%"/>
    </style:style>
    <style:style style:family="graphic" style:name="a133">
      <style:graphic-properties draw:fill="solid" draw:fill-color="#c0392b" draw:opacity="100%" draw:stroke="solid" svg:stroke-width="0.01389in" svg:stroke-color="#c0392b" svg:stroke-opacity="100%"/>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1">
      <style:graphic-properties draw:fill="none" draw:stroke="solid" svg:stroke-width="0.01389in" svg:stroke-color="#000000" svg:stroke-opacity="100%"/>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9">
      <style:drawing-page-properties draw:fill="solid" draw:fill-color="#f4f8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56">
      <style:drawing-page-properties draw:fill="solid" draw:fill-color="#0f1f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57">
      <style:graphic-properties draw:fill="solid" draw:fill-color="#1b8a5a" draw:opacity="100%" draw:stroke="solid" svg:stroke-width="0.01389in" svg:stroke-color="#1b8a5a" svg:stroke-opacity="100%"/>
    </style:style>
    <style:style style:family="text" style:name="a458">
      <style:text-properties fo:font-variant="normal" fo:text-transform="none" fo:color="#2ecc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98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2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7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2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0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8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1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5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1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0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0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6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7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4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7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4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9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3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6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4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2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9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22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Slide 1" draw:style-name="a64" draw:master-page-name="Master1-Layout1-cust-DEFAULT" presentation:presentation-page-layout-name="Master1-PPL1" draw:id="Slide-256">
        <draw:custom-shape svg:x="0in" svg:y="0in" svg:width="0.12in" svg:height="5.625in" draw:id="id6" draw:style-name="a65" draw:name="Shape 0">
          <svg:title/>
          <svg:desc/>
          <draw:enhanced-geometry xmlns:dr3d="urn:oasis:names:tc:opendocument:xmlns:dr3d:1.0" draw:type="non-primitive" svg:viewBox="0 0 21600 21600" draw:enhanced-path="M 0 0 L 21600 0 21600 21600 0 21600 Z N"/>
        </draw:custom-shape>
        <draw:custom-shape svg:x="6.93295in" svg:y="0in" svg:width="3.06705in" svg:height="2.4in" draw:id="id7" draw:style-name="a66" draw:name="Shape 1">
          <svg:title/>
          <svg:desc/>
          <draw:enhanced-geometry xmlns:dr3d="urn:oasis:names:tc:opendocument:xmlns:dr3d:1.0" draw:type="non-primitive" svg:viewBox="0 0 21600 21600" draw:enhanced-path="M 0 0 L 21600 0 21600 21600 0 21600 Z N"/>
        </draw:custom-shape>
        <draw:custom-shape svg:x="8.5in" svg:y="2.8in" svg:width="2in" svg:height="2in" draw:id="id8" draw:style-name="a67" draw:name="Shape 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8" draw:id="id9">
          <svg:title/>
          <svg:desc/>
          <draw:custom-shape svg:x="7.04842in" svg:y="0.36419in" svg:width="2.6in" svg:height="0.38in" draw:id="id24" draw:style-name="a109" draw:name="Shape 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41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04842in" svg:y="0.36419in" svg:width="2.6in" svg:height="0.38in" draw:id="id25" draw:style-name="a113" draw:name="Text 4">
            <svg:title/>
            <svg:desc/>
            <text:p text:style-name="a112" text:class-names="" text:cond-style-name=""><text:span text:style-name="a110" text:class-names="">PROJET ACADÉMIQUE · EMSI 2025–2026</text:span><text:span text:style-name="a111" text:class-names=""/></text:p>
            <draw:enhanced-geometry xmlns:dr3d="urn:oasis:names:tc:opendocument:xmlns:dr3d:1.0" draw:type="non-primitive" svg:viewBox="0 0 21600 21600" draw:enhanced-path="M 0 0 L 21600 0 21600 21600 0 21600 Z N"/>
          </draw:custom-shape>
        </draw:g>
        <draw:custom-shape svg:x="0.35in" svg:y="1.15in" svg:width="9.3in" svg:height="1.4in" draw:id="id10" draw:style-name="a71" draw:name="Text 5">
          <svg:title/>
          <svg:desc/>
          <text:p text:style-name="a70" text:class-names="" text:cond-style-name=""><text:span text:style-name="a68" text:class-names="">SPORTFIELD</text:span><text:span text:style-name="a69" text:class-names=""/></text:p>
          <draw:enhanced-geometry xmlns:dr3d="urn:oasis:names:tc:opendocument:xmlns:dr3d:1.0" draw:type="non-primitive" svg:viewBox="0 0 21600 21600" draw:enhanced-path="M 0 0 L 21600 0 21600 21600 0 21600 Z N"/>
        </draw:custom-shape>
        <draw:custom-shape svg:x="0.35in" svg:y="2.55in" svg:width="7.5in" svg:height="0.5in" draw:id="id11" draw:style-name="a75" draw:name="Text 6">
          <svg:title/>
          <svg:desc/>
          <text:p text:style-name="a74" text:class-names="" text:cond-style-name=""><text:span text:style-name="a72" text:class-names="">Système de Gestion de Réservations de Terrains</text:span><text:span text:style-name="a73" text:class-names=""/></text:p>
          <draw:enhanced-geometry xmlns:dr3d="urn:oasis:names:tc:opendocument:xmlns:dr3d:1.0" draw:type="non-primitive" svg:viewBox="0 0 21600 21600" draw:enhanced-path="M 0 0 L 21600 0 21600 21600 0 21600 Z N"/>
        </draw:custom-shape>
        <draw:custom-shape svg:x="0.35in" svg:y="3.2in" svg:width="4in" svg:height="0.04in" draw:id="id12" draw:style-name="a76" draw:name="Shape 7">
          <svg:title/>
          <svg:desc/>
          <draw:enhanced-geometry xmlns:dr3d="urn:oasis:names:tc:opendocument:xmlns:dr3d:1.0" draw:type="non-primitive" svg:viewBox="0 0 21600 21600" draw:enhanced-path="M 0 0 L 21600 0 21600 21600 0 21600 Z N"/>
        </draw:custom-shape>
        <draw:custom-shape svg:x="0.35in" svg:y="3.45in" svg:width="1.8in" svg:height="0.38in" draw:id="id13" draw:style-name="a77" draw:name="Shape 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54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35in" svg:y="3.45in" svg:width="1.8in" svg:height="0.38in" draw:id="id14" draw:style-name="a81" draw:name="Text 9">
          <svg:title/>
          <svg:desc/>
          <text:p text:style-name="a80" text:class-names="" text:cond-style-name=""><text:span text:style-name="a78" text:class-names="">Python</text:span><text:span text:style-name="a79" text:class-names=""/></text:p>
          <draw:enhanced-geometry xmlns:dr3d="urn:oasis:names:tc:opendocument:xmlns:dr3d:1.0" draw:type="non-primitive" svg:viewBox="0 0 21600 21600" draw:enhanced-path="M 0 0 L 21600 0 21600 21600 0 21600 Z N"/>
        </draw:custom-shape>
        <draw:custom-shape svg:x="2.35in" svg:y="3.45in" svg:width="1.8in" svg:height="0.38in" draw:id="id15" draw:style-name="a82" draw:name="Shape 1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54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35in" svg:y="3.45in" svg:width="1.8in" svg:height="0.38in" draw:id="id16" draw:style-name="a86" draw:name="Text 11">
          <svg:title/>
          <svg:desc/>
          <text:p text:style-name="a85" text:class-names="" text:cond-style-name=""><text:span text:style-name="a83" text:class-names="">Django<text:s text:c="1"/></text:span><text:span text:style-name="a84" text:class-names=""/></text:p>
          <draw:enhanced-geometry xmlns:dr3d="urn:oasis:names:tc:opendocument:xmlns:dr3d:1.0" draw:type="non-primitive" svg:viewBox="0 0 21600 21600" draw:enhanced-path="M 0 0 L 21600 0 21600 21600 0 21600 Z N"/>
        </draw:custom-shape>
        <draw:custom-shape svg:x="4.35in" svg:y="3.45in" svg:width="1.8in" svg:height="0.38in" draw:id="id17" draw:style-name="a87" draw:name="Shape 1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54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35in" svg:y="3.45in" svg:width="1.8in" svg:height="0.38in" draw:id="id18" draw:style-name="a91" draw:name="Text 13">
          <svg:title/>
          <svg:desc/>
          <text:p text:style-name="a90" text:class-names="" text:cond-style-name=""><text:span text:style-name="a88" text:class-names="">SQLite</text:span><text:span text:style-name="a89" text:class-names=""/></text:p>
          <draw:enhanced-geometry xmlns:dr3d="urn:oasis:names:tc:opendocument:xmlns:dr3d:1.0" draw:type="non-primitive" svg:viewBox="0 0 21600 21600" draw:enhanced-path="M 0 0 L 21600 0 21600 21600 0 21600 Z N"/>
        </draw:custom-shape>
        <draw:custom-shape svg:x="6.35in" svg:y="3.45in" svg:width="1.8in" svg:height="0.38in" draw:id="id19" draw:style-name="a92" draw:name="Shape 1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54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35in" svg:y="3.45in" svg:width="1.8in" svg:height="0.38in" draw:id="id20" draw:style-name="a96" draw:name="Text 15">
          <svg:title/>
          <svg:desc/>
          <text:p text:style-name="a95" text:class-names="" text:cond-style-name=""><text:span text:style-name="a93" text:class-names="">Bootstrap 5</text:span><text:span text:style-name="a94" text:class-names=""/></text:p>
          <draw:enhanced-geometry xmlns:dr3d="urn:oasis:names:tc:opendocument:xmlns:dr3d:1.0" draw:type="non-primitive" svg:viewBox="0 0 21600 21600" draw:enhanced-path="M 0 0 L 21600 0 21600 21600 0 21600 Z N"/>
        </draw:custom-shape>
        <draw:custom-shape svg:x="0.35in" svg:y="4.85in" svg:width="9.3in" svg:height="0.4in" draw:id="id21" draw:style-name="a99" draw:name="Text 16">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frame draw:id="id22" draw:style-name="a107" draw:name="TextBox 19" svg:x="0.81818in" svg:y="4.14773in" svg:width="7.77273in" svg:height="0.77415in">
          <draw:text-box>
            <text:p text:style-name="a106" text:class-names="" text:cond-style-name=""><text:span text:style-name="a100" text:class-names="">Présenté</text:span><text:span text:style-name="a101" text:class-names=""><text:s text:c="1"/>par : Mohamed<text:s text:c="1"/></text:span><text:span text:style-name="a102" text:class-names="">Maaninou</text:span><text:span text:style-name="a103" text:class-names=""><text:line-break/></text:span><text:span text:style-name="a104" text:class-names="">Encadré</text:span><text:span text:style-name="a105" text:class-names=""><text:s text:c="1"/>par : M. Mohamed Ghazouani</text:span></text:p>
          </draw:text-box>
          <svg:title/>
          <svg:desc/>
        </draw:frame>
        <draw:frame draw:id="id23" draw:style-name="a108" draw:name="Picture 20" svg:x="0.44031in" svg:y="0.14793in" svg:width="3in" svg:height="0.81in" style:rel-width="scale" style:rel-height="scale">
          <draw:image xlink:href="media/image1.png" xlink:type="simple" xlink:show="embed" xlink:actuate="onLoad"/>
          <svg:title/>
          <svg:desc>HOME | EMSI</svg:desc>
        </draw:frame>
        <presentation:notes draw:style-name="a121">
          <draw:page-thumbnail draw:page-number="1" svg:x="-0.1875in" svg:y="1.25in" svg:width="6in" svg:height="3.375in" presentation:class="page" draw:id="id26" presentation:style-name="a114" draw:name="Slide Image Placeholder 1">
            <svg:title/>
            <svg:desc/>
          </draw:page-thumbnail>
          <draw:frame draw:id="id27" presentation:style-name="a117" draw:name="Notes Placeholder 2" svg:x="0.5625in" svg:y="4.8125in" svg:width="4.5in" svg:height="3.9375in" presentation:class="notes" presentation:placeholder="false">
            <draw:text-box>
              <text:p text:style-name="a116" text:class-names="" text:cond-style-name=""><text:span text:style-name="a115" text:class-names="">Bonjour. Aujourd'hui je vous présente SportField, une application web Django développée dans le cadre académique 2025-2026 à l'EMSI Casablanca. Ce système modernise la gestion des réservations de terrains sportifs.</text:span></text:p>
            </draw:text-box>
            <svg:title/>
            <svg:desc/>
          </draw:frame>
          <draw:frame draw:id="id28" presentation:style-name="a120" draw:name="Slide Number Placeholder 3" svg:x="3.18576in" svg:y="9.49826in" svg:width="2.4375in" svg:height="0.50174in" presentation:class="page-number" presentation:placeholder="false">
            <draw:text-box>
              <text:p text:style-name="a119" text:class-names="" text:cond-style-name=""><text:span text:style-name="a118" text:class-names=""><text:page-number style:num-format="1" text:fixed="false">1</text:page-number></text:span></text:p>
            </draw:text-box>
            <svg:title/>
            <svg:desc/>
          </draw:frame>
        </presentation:notes>
      </draw:page>
      <draw:page draw:name="Slide 2" draw:style-name="a122" draw:master-page-name="Master1-Layout1-cust-DEFAULT" presentation:presentation-page-layout-name="Master1-PPL1" draw:id="Slide-257">
        <draw:custom-shape svg:x="0in" svg:y="0in" svg:width="10in" svg:height="0.08in" draw:id="id29" draw:style-name="a123" draw:name="Shape 0">
          <svg:title/>
          <svg:desc/>
          <draw:enhanced-geometry xmlns:dr3d="urn:oasis:names:tc:opendocument:xmlns:dr3d:1.0" draw:type="non-primitive" svg:viewBox="0 0 21600 21600" draw:enhanced-path="M 0 0 L 21600 0 21600 21600 0 21600 Z N"/>
        </draw:custom-shape>
        <draw:custom-shape svg:x="0.5in" svg:y="0.22in" svg:width="9in" svg:height="0.45in" draw:id="id30" draw:style-name="a127" draw:name="Text 1">
          <svg:title/>
          <svg:desc/>
          <text:p text:style-name="a126" text:class-names="" text:cond-style-name=""><text:span text:style-name="a124" text:class-names="">01 — CONTEXTE &amp; PROBLÈME</text:span><text:span text:style-name="a125" text:class-names=""/></text:p>
          <draw:enhanced-geometry xmlns:dr3d="urn:oasis:names:tc:opendocument:xmlns:dr3d:1.0" draw:type="non-primitive" svg:viewBox="0 0 21600 21600" draw:enhanced-path="M 0 0 L 21600 0 21600 21600 0 21600 Z N"/>
        </draw:custom-shape>
        <draw:custom-shape svg:x="0.5in" svg:y="0.72in" svg:width="7in" svg:height="0.65in" draw:id="id31" draw:style-name="a131" draw:name="Text 2">
          <svg:title/>
          <svg:desc/>
          <text:p text:style-name="a130" text:class-names="" text:cond-style-name=""><text:span text:style-name="a128" text:class-names="">Pourquoi SportField ?</text:span><text:span text:style-name="a129" text:class-names=""/></text:p>
          <draw:enhanced-geometry xmlns:dr3d="urn:oasis:names:tc:opendocument:xmlns:dr3d:1.0" draw:type="non-primitive" svg:viewBox="0 0 21600 21600" draw:enhanced-path="M 0 0 L 21600 0 21600 21600 0 21600 Z N"/>
        </draw:custom-shape>
        <draw:custom-shape svg:x="0.5in" svg:y="1.62in" svg:width="4.2in" svg:height="3.3in" draw:id="id32" draw:style-name="a132" draw:name="Shape 3">
          <svg:title/>
          <svg:desc/>
          <draw:enhanced-geometry xmlns:dr3d="urn:oasis:names:tc:opendocument:xmlns:dr3d:1.0" draw:type="non-primitive" svg:viewBox="0 0 21600 21600" draw:enhanced-path="M 0 0 L 21600 0 21600 21600 0 21600 Z N"/>
        </draw:custom-shape>
        <draw:custom-shape svg:x="0.5in" svg:y="1.62in" svg:width="4.2in" svg:height="0.42in" draw:id="id33" draw:style-name="a133" draw:name="Shape 4">
          <svg:title/>
          <svg:desc/>
          <draw:enhanced-geometry xmlns:dr3d="urn:oasis:names:tc:opendocument:xmlns:dr3d:1.0" draw:type="non-primitive" svg:viewBox="0 0 21600 21600" draw:enhanced-path="M 0 0 L 21600 0 21600 21600 0 21600 Z N"/>
        </draw:custom-shape>
        <draw:custom-shape svg:x="0.5in" svg:y="1.62in" svg:width="4.2in" svg:height="0.42in" draw:id="id34" draw:style-name="a140" draw:name="Text 5">
          <svg:title/>
          <svg:desc/>
          <text:p text:style-name="a139" text:class-names="" text:cond-style-name=""><text:span text:style-name="a134" text:class-names=""><text:s text:c="1"/></text:span><text:span text:style-name="a135" text:class-names="">Problèmes</text:span><text:span text:style-name="a136" text:class-names=""><text:s text:c="1"/></text:span><text:span text:style-name="a137" text:class-names="">Actuels</text:span><text:span text:style-name="a138" text:class-names=""/></text:p>
          <draw:enhanced-geometry xmlns:dr3d="urn:oasis:names:tc:opendocument:xmlns:dr3d:1.0" draw:type="non-primitive" svg:viewBox="0 0 21600 21600" draw:enhanced-path="M 0 0 L 21600 0 21600 21600 0 21600 Z N"/>
        </draw:custom-shape>
        <draw:custom-shape svg:x="0.7in" svg:y="2.15in" svg:width="3.8in" svg:height="2.6in" draw:id="id35" draw:style-name="a157" draw:name="Text 6">
          <svg:title/>
          <svg:desc/>
          <text:list text:style-name="a144">
            <text:list-item>
              <text:p text:style-name="a143" text:class-names="" text:cond-style-name=""><text:span text:style-name="a141" text:class-names="">Double réservation sur un même terrain</text:span><text:span text:style-name="a142" text:class-names=""/></text:p>
            </text:list-item>
          </text:list>
          <text:list text:style-name="a148">
            <text:list-item>
              <text:p text:style-name="a147" text:class-names="" text:cond-style-name=""><text:span text:style-name="a145" text:class-names="">Gestion manuelle et désorganisée</text:span><text:span text:style-name="a146" text:class-names=""/></text:p>
            </text:list-item>
          </text:list>
          <text:list text:style-name="a152">
            <text:list-item>
              <text:p text:style-name="a151" text:class-names="" text:cond-style-name=""><text:span text:style-name="a149" text:class-names="">Aucune vision calendaire en temps réel</text:span><text:span text:style-name="a150" text:class-names=""/></text:p>
            </text:list-item>
          </text:list>
          <text:list text:style-name="a156">
            <text:list-item>
              <text:p text:style-name="a155" text:class-names="" text:cond-style-name=""><text:span text:style-name="a153" text:class-names="">Pas de centralisation des données</text:span><text:span text:style-name="a154" text:class-names=""/></text:p>
            </text:list-item>
          </text:list>
          <draw:enhanced-geometry xmlns:dr3d="urn:oasis:names:tc:opendocument:xmlns:dr3d:1.0" draw:type="non-primitive" svg:viewBox="0 0 21600 21600" draw:enhanced-path="M 0 0 L 21600 0 21600 21600 0 21600 Z N"/>
        </draw:custom-shape>
        <draw:custom-shape svg:x="5.3in" svg:y="1.62in" svg:width="4.2in" svg:height="3.3in" draw:id="id36" draw:style-name="a158" draw:name="Shape 7">
          <svg:title/>
          <svg:desc/>
          <draw:enhanced-geometry xmlns:dr3d="urn:oasis:names:tc:opendocument:xmlns:dr3d:1.0" draw:type="non-primitive" svg:viewBox="0 0 21600 21600" draw:enhanced-path="M 0 0 L 21600 0 21600 21600 0 21600 Z N"/>
        </draw:custom-shape>
        <draw:custom-shape svg:x="5.3in" svg:y="1.62in" svg:width="4.2in" svg:height="0.42in" draw:id="id37" draw:style-name="a159" draw:name="Shape 8">
          <svg:title/>
          <svg:desc/>
          <draw:enhanced-geometry xmlns:dr3d="urn:oasis:names:tc:opendocument:xmlns:dr3d:1.0" draw:type="non-primitive" svg:viewBox="0 0 21600 21600" draw:enhanced-path="M 0 0 L 21600 0 21600 21600 0 21600 Z N"/>
        </draw:custom-shape>
        <draw:custom-shape svg:x="5.3in" svg:y="1.62in" svg:width="4.2in" svg:height="0.42in" draw:id="id38" draw:style-name="a164" draw:name="Text 9">
          <svg:title/>
          <svg:desc/>
          <text:p text:style-name="a163" text:class-names="" text:cond-style-name=""><text:span text:style-name="a160" text:class-names="">Solutions<text:s text:c="1"/></text:span><text:span text:style-name="a161" text:class-names="">SportField</text:span><text:span text:style-name="a162" text:class-names=""/></text:p>
          <draw:enhanced-geometry xmlns:dr3d="urn:oasis:names:tc:opendocument:xmlns:dr3d:1.0" draw:type="non-primitive" svg:viewBox="0 0 21600 21600" draw:enhanced-path="M 0 0 L 21600 0 21600 21600 0 21600 Z N"/>
        </draw:custom-shape>
        <draw:custom-shape svg:x="5.5in" svg:y="2.15in" svg:width="3.8in" svg:height="2.6in" draw:id="id39" draw:style-name="a181" draw:name="Text 10">
          <svg:title/>
          <svg:desc/>
          <text:list text:style-name="a168">
            <text:list-item>
              <text:p text:style-name="a167" text:class-names="" text:cond-style-name=""><text:span text:style-name="a165" text:class-names="">Algorithme anti-chevauchement double couche</text:span><text:span text:style-name="a166" text:class-names=""/></text:p>
            </text:list-item>
          </text:list>
          <text:list text:style-name="a172">
            <text:list-item>
              <text:p text:style-name="a171" text:class-names="" text:cond-style-name=""><text:span text:style-name="a169" text:class-names="">Back-office Django centralisé</text:span><text:span text:style-name="a170" text:class-names=""/></text:p>
            </text:list-item>
          </text:list>
          <text:list text:style-name="a176">
            <text:list-item>
              <text:p text:style-name="a175" text:class-names="" text:cond-style-name=""><text:span text:style-name="a173" text:class-names="">Calendrier d'occupation en temps réel</text:span><text:span text:style-name="a174" text:class-names=""/></text:p>
            </text:list-item>
          </text:list>
          <text:list text:style-name="a180">
            <text:list-item>
              <text:p text:style-name="a179" text:class-names="" text:cond-style-name=""><text:span text:style-name="a177" text:class-names="">Interface Bootstrap 5 intuitive</text:span><text:span text:style-name="a178" text:class-names=""/></text:p>
            </text:list-item>
          </text:list>
          <draw:enhanced-geometry xmlns:dr3d="urn:oasis:names:tc:opendocument:xmlns:dr3d:1.0" draw:type="non-primitive" svg:viewBox="0 0 21600 21600" draw:enhanced-path="M 0 0 L 21600 0 21600 21600 0 21600 Z N"/>
        </draw:custom-shape>
        <presentation:notes draw:style-name="a189">
          <draw:page-thumbnail draw:page-number="2" svg:x="-0.1875in" svg:y="1.25in" svg:width="6in" svg:height="3.375in" presentation:class="page" draw:id="id40" presentation:style-name="a182" draw:name="Slide Image Placeholder 1">
            <svg:title/>
            <svg:desc/>
          </draw:page-thumbnail>
          <draw:frame draw:id="id41" presentation:style-name="a185" draw:name="Notes Placeholder 2" svg:x="0.5625in" svg:y="4.8125in" svg:width="4.5in" svg:height="3.9375in" presentation:class="notes" presentation:placeholder="false">
            <draw:text-box>
              <text:p text:style-name="a184" text:class-names="" text:cond-style-name=""><text:span text:style-name="a183" text:class-names="">Le point de départ de SportField est un problème concret : les complexes sportifs font face à des doubles réservations, une gestion manuelle chaotique et l'absence de visibilité en temps réel. SportField répond à chacun de ces problèmes avec une solution technique claire.</text:span></text:p>
            </draw:text-box>
            <svg:title/>
            <svg:desc/>
          </draw:frame>
          <draw:frame draw:id="id42" presentation:style-name="a188" draw:name="Slide Number Placeholder 3" svg:x="3.18576in" svg:y="9.49826in" svg:width="2.4375in" svg:height="0.50174in" presentation:class="page-number" presentation:placeholder="false">
            <draw:text-box>
              <text:p text:style-name="a187" text:class-names="" text:cond-style-name=""><text:span text:style-name="a186" text:class-names=""><text:page-number style:num-format="1" text:fixed="false">2</text:page-number></text:span></text:p>
            </draw:text-box>
            <svg:title/>
            <svg:desc/>
          </draw:frame>
        </presentation:notes>
      </draw:page>
      <draw:page draw:name="Slide 3" draw:style-name="a190" draw:master-page-name="Master1-Layout1-cust-DEFAULT" presentation:presentation-page-layout-name="Master1-PPL1" draw:id="Slide-258">
        <draw:custom-shape svg:x="0in" svg:y="0in" svg:width="10in" svg:height="0.08in" draw:id="id43" draw:style-name="a191"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44" draw:style-name="a195" draw:name="Text 1">
          <svg:title/>
          <svg:desc/>
          <text:p text:style-name="a194" text:class-names="" text:cond-style-name=""><text:span text:style-name="a192" text:class-names="">02 — PROFILS UTILISATEURS</text:span><text:span text:style-name="a193" text:class-names=""/></text:p>
          <draw:enhanced-geometry xmlns:dr3d="urn:oasis:names:tc:opendocument:xmlns:dr3d:1.0" draw:type="non-primitive" svg:viewBox="0 0 21600 21600" draw:enhanced-path="M 0 0 L 21600 0 21600 21600 0 21600 Z N"/>
        </draw:custom-shape>
        <draw:custom-shape svg:x="0.5in" svg:y="0.65in" svg:width="7in" svg:height="0.6in" draw:id="id45" draw:style-name="a199" draw:name="Text 2">
          <svg:title/>
          <svg:desc/>
          <text:p text:style-name="a198" text:class-names="" text:cond-style-name=""><text:span text:style-name="a196" text:class-names="">Qui utilise SportField ?</text:span><text:span text:style-name="a197" text:class-names=""/></text:p>
          <draw:enhanced-geometry xmlns:dr3d="urn:oasis:names:tc:opendocument:xmlns:dr3d:1.0" draw:type="non-primitive" svg:viewBox="0 0 21600 21600" draw:enhanced-path="M 0 0 L 21600 0 21600 21600 0 21600 Z N"/>
        </draw:custom-shape>
        <draw:custom-shape svg:x="0.5in" svg:y="1.55in" svg:width="4.1in" svg:height="3.55in" draw:id="id46" draw:style-name="a200" draw:name="Shape 3">
          <svg:title/>
          <svg:desc/>
          <draw:enhanced-geometry xmlns:dr3d="urn:oasis:names:tc:opendocument:xmlns:dr3d:1.0" draw:type="non-primitive" svg:viewBox="0 0 21600 21600" draw:enhanced-path="M 0 0 L 21600 0 21600 21600 0 21600 Z N"/>
        </draw:custom-shape>
        <draw:custom-shape svg:x="0.5in" svg:y="1.55in" svg:width="4.1in" svg:height="0.08in" draw:id="id47" draw:style-name="a201" draw:name="Shape 4">
          <svg:title/>
          <svg:desc/>
          <draw:enhanced-geometry xmlns:dr3d="urn:oasis:names:tc:opendocument:xmlns:dr3d:1.0" draw:type="non-primitive" svg:viewBox="0 0 21600 21600" draw:enhanced-path="M 0 0 L 21600 0 21600 21600 0 21600 Z N"/>
        </draw:custom-shape>
        <draw:custom-shape svg:x="1.75in" svg:y="1.85in" svg:width="1.6in" svg:height="1.6in" draw:id="id48" draw:style-name="a202" draw:name="Shape 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5in" svg:y="1.9in" svg:width="1.6in" svg:height="1.5in" draw:id="id49" draw:style-name="a205" draw:name="Text 6">
          <svg:title/>
          <svg:desc/>
          <text:p text:style-name="a204" text:class-names="" text:cond-style-name=""><text:span text:style-name="a203" text:class-names=""/></text:p>
          <draw:enhanced-geometry xmlns:dr3d="urn:oasis:names:tc:opendocument:xmlns:dr3d:1.0" draw:type="non-primitive" svg:viewBox="0 0 21600 21600" draw:enhanced-path="M 0 0 L 21600 0 21600 21600 0 21600 Z N"/>
        </draw:custom-shape>
        <draw:custom-shape svg:x="0.5in" svg:y="3.6in" svg:width="4.1in" svg:height="0.4in" draw:id="id50" draw:style-name="a209" draw:name="Text 7">
          <svg:title/>
          <svg:desc/>
          <text:p text:style-name="a208" text:class-names="" text:cond-style-name=""><text:span text:style-name="a206" text:class-names="">JOUEUR</text:span><text:span text:style-name="a207" text:class-names=""/></text:p>
          <draw:enhanced-geometry xmlns:dr3d="urn:oasis:names:tc:opendocument:xmlns:dr3d:1.0" draw:type="non-primitive" svg:viewBox="0 0 21600 21600" draw:enhanced-path="M 0 0 L 21600 0 21600 21600 0 21600 Z N"/>
        </draw:custom-shape>
        <draw:custom-shape svg:x="0.7in" svg:y="4.05in" svg:width="3.7in" svg:height="1in" draw:id="id51" draw:style-name="a226" draw:name="Text 8">
          <svg:title/>
          <svg:desc/>
          <text:list text:style-name="a213">
            <text:list-item>
              <text:p text:style-name="a212" text:class-names="" text:cond-style-name=""><text:span text:style-name="a210" text:class-names="">Rechercher des terrains</text:span><text:span text:style-name="a211" text:class-names=""/></text:p>
            </text:list-item>
          </text:list>
          <text:list text:style-name="a217">
            <text:list-item>
              <text:p text:style-name="a216" text:class-names="" text:cond-style-name=""><text:span text:style-name="a214" text:class-names="">Filtrer par sport / dispo</text:span><text:span text:style-name="a215" text:class-names=""/></text:p>
            </text:list-item>
          </text:list>
          <text:list text:style-name="a221">
            <text:list-item>
              <text:p text:style-name="a220" text:class-names="" text:cond-style-name=""><text:span text:style-name="a218" text:class-names="">Réserver un créneau</text:span><text:span text:style-name="a219" text:class-names=""/></text:p>
            </text:list-item>
          </text:list>
          <text:list text:style-name="a225">
            <text:list-item>
              <text:p text:style-name="a224" text:class-names="" text:cond-style-name=""><text:span text:style-name="a222" text:class-names="">Voir le calendrier</text:span><text:span text:style-name="a223" text:class-names=""/></text:p>
            </text:list-item>
          </text:list>
          <draw:enhanced-geometry xmlns:dr3d="urn:oasis:names:tc:opendocument:xmlns:dr3d:1.0" draw:type="non-primitive" svg:viewBox="0 0 21600 21600" draw:enhanced-path="M 0 0 L 21600 0 21600 21600 0 21600 Z N"/>
        </draw:custom-shape>
        <draw:custom-shape svg:x="5.4in" svg:y="1.55in" svg:width="4.1in" svg:height="3.55in" draw:id="id52" draw:style-name="a227" draw:name="Shape 9">
          <svg:title/>
          <svg:desc/>
          <draw:enhanced-geometry xmlns:dr3d="urn:oasis:names:tc:opendocument:xmlns:dr3d:1.0" draw:type="non-primitive" svg:viewBox="0 0 21600 21600" draw:enhanced-path="M 0 0 L 21600 0 21600 21600 0 21600 Z N"/>
        </draw:custom-shape>
        <draw:custom-shape svg:x="5.4in" svg:y="1.55in" svg:width="4.1in" svg:height="0.08in" draw:id="id53" draw:style-name="a228" draw:name="Shape 10">
          <svg:title/>
          <svg:desc/>
          <draw:enhanced-geometry xmlns:dr3d="urn:oasis:names:tc:opendocument:xmlns:dr3d:1.0" draw:type="non-primitive" svg:viewBox="0 0 21600 21600" draw:enhanced-path="M 0 0 L 21600 0 21600 21600 0 21600 Z N"/>
        </draw:custom-shape>
        <draw:custom-shape svg:x="6.65in" svg:y="1.85in" svg:width="1.6in" svg:height="1.6in" draw:id="id54" draw:style-name="a229" draw:name="Shape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5in" svg:y="1.9in" svg:width="1.6in" svg:height="1.5in" draw:id="id55" draw:style-name="a233" draw:name="Text 12">
          <svg:title/>
          <svg:desc/>
          <text:p text:style-name="a232" text:class-names="" text:cond-style-name=""><text:span text:style-name="a230" text:class-names="">⚙️</text:span><text:span text:style-name="a231" text:class-names=""/></text:p>
          <draw:enhanced-geometry xmlns:dr3d="urn:oasis:names:tc:opendocument:xmlns:dr3d:1.0" draw:type="non-primitive" svg:viewBox="0 0 21600 21600" draw:enhanced-path="M 0 0 L 21600 0 21600 21600 0 21600 Z N"/>
        </draw:custom-shape>
        <draw:custom-shape svg:x="5.4in" svg:y="3.6in" svg:width="4.1in" svg:height="0.4in" draw:id="id56" draw:style-name="a237" draw:name="Text 13">
          <svg:title/>
          <svg:desc/>
          <text:p text:style-name="a236" text:class-names="" text:cond-style-name=""><text:span text:style-name="a234" text:class-names="">ADMINISTRATEUR</text:span><text:span text:style-name="a235" text:class-names=""/></text:p>
          <draw:enhanced-geometry xmlns:dr3d="urn:oasis:names:tc:opendocument:xmlns:dr3d:1.0" draw:type="non-primitive" svg:viewBox="0 0 21600 21600" draw:enhanced-path="M 0 0 L 21600 0 21600 21600 0 21600 Z N"/>
        </draw:custom-shape>
        <draw:custom-shape svg:x="5.6in" svg:y="4.05in" svg:width="3.7in" svg:height="1in" draw:id="id57" draw:style-name="a254" draw:name="Text 14">
          <svg:title/>
          <svg:desc/>
          <text:list text:style-name="a241">
            <text:list-item>
              <text:p text:style-name="a240" text:class-names="" text:cond-style-name=""><text:span text:style-name="a238" text:class-names="">Gérer sports &amp; terrains</text:span><text:span text:style-name="a239" text:class-names=""/></text:p>
            </text:list-item>
          </text:list>
          <text:list text:style-name="a245">
            <text:list-item>
              <text:p text:style-name="a244" text:class-names="" text:cond-style-name=""><text:span text:style-name="a242" text:class-names="">Voir &amp; supprimer réservations</text:span><text:span text:style-name="a243" text:class-names=""/></text:p>
            </text:list-item>
          </text:list>
          <text:list text:style-name="a249">
            <text:list-item>
              <text:p text:style-name="a248" text:class-names="" text:cond-style-name=""><text:span text:style-name="a246" text:class-names="">Interface /admin Django</text:span><text:span text:style-name="a247" text:class-names=""/></text:p>
            </text:list-item>
          </text:list>
          <text:list text:style-name="a253">
            <text:list-item>
              <text:p text:style-name="a252" text:class-names="" text:cond-style-name=""><text:span text:style-name="a250" text:class-names="">Basculer la disponibilité</text:span><text:span text:style-name="a251" text:class-names=""/></text:p>
            </text:list-item>
          </text:list>
          <draw:enhanced-geometry xmlns:dr3d="urn:oasis:names:tc:opendocument:xmlns:dr3d:1.0" draw:type="non-primitive" svg:viewBox="0 0 21600 21600" draw:enhanced-path="M 0 0 L 21600 0 21600 21600 0 21600 Z N"/>
        </draw:custom-shape>
        <draw:frame draw:id="id58" draw:style-name="a255" draw:name="Picture 19" svg:x="2.18182in" svg:y="2.27841in" svg:width="0.73864in" svg:height="0.73864in" style:rel-width="scale" style:rel-height="scale">
          <draw:image xlink:href="media/image2.png" xlink:type="simple" xlink:show="embed" xlink:actuate="onLoad"/>
          <svg:title/>
          <svg:desc>Utilisateur - Icônes gens gratuites</svg:desc>
        </draw:frame>
        <presentation:notes draw:style-name="a263">
          <draw:page-thumbnail draw:page-number="3" svg:x="-0.1875in" svg:y="1.25in" svg:width="6in" svg:height="3.375in" presentation:class="page" draw:id="id59" presentation:style-name="a256" draw:name="Slide Image Placeholder 1">
            <svg:title/>
            <svg:desc/>
          </draw:page-thumbnail>
          <draw:frame draw:id="id60" presentation:style-name="a259" draw:name="Notes Placeholder 2" svg:x="0.5625in" svg:y="4.8125in" svg:width="4.5in" svg:height="3.9375in" presentation:class="notes" presentation:placeholder="false">
            <draw:text-box>
              <text:p text:style-name="a258" text:class-names="" text:cond-style-name=""><text:span text:style-name="a257" text:class-names="">SportField s'adresse à deux profils distincts. Le Joueur accède à l'interface web Bootstrap pour rechercher et réserver. L'Administrateur gère l'ensemble de la plateforme via l'interface /admin Django.</text:span></text:p>
            </draw:text-box>
            <svg:title/>
            <svg:desc/>
          </draw:frame>
          <draw:frame draw:id="id61" presentation:style-name="a262" draw:name="Slide Number Placeholder 3" svg:x="3.18576in" svg:y="9.49826in" svg:width="2.4375in" svg:height="0.50174in" presentation:class="page-number" presentation:placeholder="false">
            <draw:text-box>
              <text:p text:style-name="a261" text:class-names="" text:cond-style-name=""><text:span text:style-name="a260" text:class-names=""><text:page-number style:num-format="1" text:fixed="false">3</text:page-number></text:span></text:p>
            </draw:text-box>
            <svg:title/>
            <svg:desc/>
          </draw:frame>
        </presentation:notes>
      </draw:page>
      <draw:page draw:name="Slide 4" draw:style-name="a264" draw:master-page-name="Master1-Layout1-cust-DEFAULT" presentation:presentation-page-layout-name="Master1-PPL1" draw:id="Slide-259">
        <draw:custom-shape svg:x="0in" svg:y="0in" svg:width="10in" svg:height="0.08in" draw:id="id62" draw:style-name="a265"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63" draw:style-name="a269" draw:name="Text 1">
          <svg:title/>
          <svg:desc/>
          <text:p text:style-name="a268" text:class-names="" text:cond-style-name=""><text:span text:style-name="a266" text:class-names="">03 — ARCHITECTURE DU PROJET</text:span><text:span text:style-name="a267" text:class-names=""/></text:p>
          <draw:enhanced-geometry xmlns:dr3d="urn:oasis:names:tc:opendocument:xmlns:dr3d:1.0" draw:type="non-primitive" svg:viewBox="0 0 21600 21600" draw:enhanced-path="M 0 0 L 21600 0 21600 21600 0 21600 Z N"/>
        </draw:custom-shape>
        <draw:custom-shape svg:x="0.5in" svg:y="0.65in" svg:width="7in" svg:height="0.6in" draw:id="id64" draw:style-name="a273" draw:name="Text 2">
          <svg:title/>
          <svg:desc/>
          <text:p text:style-name="a272" text:class-names="" text:cond-style-name=""><text:span text:style-name="a270" text:class-names="">Pattern Django MVT</text:span><text:span text:style-name="a271" text:class-names=""/></text:p>
          <draw:enhanced-geometry xmlns:dr3d="urn:oasis:names:tc:opendocument:xmlns:dr3d:1.0" draw:type="non-primitive" svg:viewBox="0 0 21600 21600" draw:enhanced-path="M 0 0 L 21600 0 21600 21600 0 21600 Z N"/>
        </draw:custom-shape>
        <draw:custom-shape svg:x="0.4in" svg:y="1.6in" svg:width="2.5in" svg:height="3.3in" draw:id="id65" draw:style-name="a274" draw:name="Shape 3">
          <svg:title/>
          <svg:desc/>
          <draw:enhanced-geometry xmlns:dr3d="urn:oasis:names:tc:opendocument:xmlns:dr3d:1.0" draw:type="non-primitive" svg:viewBox="0 0 21600 21600" draw:enhanced-path="M 0 0 L 21600 0 21600 21600 0 21600 Z N"/>
        </draw:custom-shape>
        <draw:custom-shape svg:x="0.4in" svg:y="1.6in" svg:width="2.5in" svg:height="0.55in" draw:id="id66" draw:style-name="a275" draw:name="Shape 4">
          <svg:title/>
          <svg:desc/>
          <draw:enhanced-geometry xmlns:dr3d="urn:oasis:names:tc:opendocument:xmlns:dr3d:1.0" draw:type="non-primitive" svg:viewBox="0 0 21600 21600" draw:enhanced-path="M 0 0 L 21600 0 21600 21600 0 21600 Z N"/>
        </draw:custom-shape>
        <draw:custom-shape svg:x="0.4in" svg:y="1.6in" svg:width="2.5in" svg:height="0.55in" draw:id="id67" draw:style-name="a279" draw:name="Text 5">
          <svg:title/>
          <svg:desc/>
          <text:p text:style-name="a278" text:class-names="" text:cond-style-name=""><text:span text:style-name="a276" text:class-names="">MODEL</text:span><text:span text:style-name="a277" text:class-names=""/></text:p>
          <draw:enhanced-geometry xmlns:dr3d="urn:oasis:names:tc:opendocument:xmlns:dr3d:1.0" draw:type="non-primitive" svg:viewBox="0 0 21600 21600" draw:enhanced-path="M 0 0 L 21600 0 21600 21600 0 21600 Z N"/>
        </draw:custom-shape>
        <draw:custom-shape svg:x="0.4in" svg:y="2.25in" svg:width="2.5in" svg:height="0.36in" draw:id="id68" draw:style-name="a283" draw:name="Text 6">
          <svg:title/>
          <svg:desc/>
          <text:p text:style-name="a282" text:class-names="" text:cond-style-name=""><text:span text:style-name="a280" text:class-names="">models.py</text:span><text:span text:style-name="a281" text:class-names=""/></text:p>
          <draw:enhanced-geometry xmlns:dr3d="urn:oasis:names:tc:opendocument:xmlns:dr3d:1.0" draw:type="non-primitive" svg:viewBox="0 0 21600 21600" draw:enhanced-path="M 0 0 L 21600 0 21600 21600 0 21600 Z N"/>
        </draw:custom-shape>
        <draw:custom-shape svg:x="0.55in" svg:y="2.7in" svg:width="2.2in" svg:height="2in" draw:id="id69" draw:style-name="a293" draw:name="Text 7">
          <svg:title/>
          <svg:desc/>
          <text:p text:style-name="a286" text:class-names="" text:cond-style-name=""><text:span text:style-name="a284" text:class-names="">4 entités ORM</text:span><text:span text:style-name="a285" text:class-names=""/></text:p>
          <text:p text:style-name="a289" text:class-names="" text:cond-style-name=""><text:span text:style-name="a287" text:class-names="">Sport · Terrain</text:span><text:span text:style-name="a288" text:class-names=""/></text:p>
          <text:p text:style-name="a292" text:class-names="" text:cond-style-name=""><text:span text:style-name="a290" text:class-names="">Joueur · Reservation</text:span><text:span text:style-name="a291" text:class-names=""/></text:p>
          <draw:enhanced-geometry xmlns:dr3d="urn:oasis:names:tc:opendocument:xmlns:dr3d:1.0" draw:type="non-primitive" svg:viewBox="0 0 21600 21600" draw:enhanced-path="M 0 0 L 21600 0 21600 21600 0 21600 Z N"/>
        </draw:custom-shape>
        <draw:custom-shape svg:x="3.8in" svg:y="1.6in" svg:width="2.5in" svg:height="3.3in" draw:id="id70" draw:style-name="a294" draw:name="Shape 8">
          <svg:title/>
          <svg:desc/>
          <draw:enhanced-geometry xmlns:dr3d="urn:oasis:names:tc:opendocument:xmlns:dr3d:1.0" draw:type="non-primitive" svg:viewBox="0 0 21600 21600" draw:enhanced-path="M 0 0 L 21600 0 21600 21600 0 21600 Z N"/>
        </draw:custom-shape>
        <draw:custom-shape svg:x="3.8in" svg:y="1.6in" svg:width="2.5in" svg:height="0.55in" draw:id="id71" draw:style-name="a295" draw:name="Shape 9">
          <svg:title/>
          <svg:desc/>
          <draw:enhanced-geometry xmlns:dr3d="urn:oasis:names:tc:opendocument:xmlns:dr3d:1.0" draw:type="non-primitive" svg:viewBox="0 0 21600 21600" draw:enhanced-path="M 0 0 L 21600 0 21600 21600 0 21600 Z N"/>
        </draw:custom-shape>
        <draw:custom-shape svg:x="3.8in" svg:y="1.6in" svg:width="2.5in" svg:height="0.55in" draw:id="id72" draw:style-name="a299" draw:name="Text 10">
          <svg:title/>
          <svg:desc/>
          <text:p text:style-name="a298" text:class-names="" text:cond-style-name=""><text:span text:style-name="a296" text:class-names="">VIEW</text:span><text:span text:style-name="a297" text:class-names=""/></text:p>
          <draw:enhanced-geometry xmlns:dr3d="urn:oasis:names:tc:opendocument:xmlns:dr3d:1.0" draw:type="non-primitive" svg:viewBox="0 0 21600 21600" draw:enhanced-path="M 0 0 L 21600 0 21600 21600 0 21600 Z N"/>
        </draw:custom-shape>
        <draw:custom-shape svg:x="3.8in" svg:y="2.25in" svg:width="2.5in" svg:height="0.36in" draw:id="id73" draw:style-name="a303" draw:name="Text 11">
          <svg:title/>
          <svg:desc/>
          <text:p text:style-name="a302" text:class-names="" text:cond-style-name=""><text:span text:style-name="a300" text:class-names="">views.py</text:span><text:span text:style-name="a301" text:class-names=""/></text:p>
          <draw:enhanced-geometry xmlns:dr3d="urn:oasis:names:tc:opendocument:xmlns:dr3d:1.0" draw:type="non-primitive" svg:viewBox="0 0 21600 21600" draw:enhanced-path="M 0 0 L 21600 0 21600 21600 0 21600 Z N"/>
        </draw:custom-shape>
        <draw:custom-shape svg:x="3.95in" svg:y="2.7in" svg:width="2.2in" svg:height="2in" draw:id="id74" draw:style-name="a313" draw:name="Text 12">
          <svg:title/>
          <svg:desc/>
          <text:p text:style-name="a306" text:class-names="" text:cond-style-name=""><text:span text:style-name="a304" text:class-names="">6 vues fonctionnelles</text:span><text:span text:style-name="a305" text:class-names=""/></text:p>
          <text:p text:style-name="a309" text:class-names="" text:cond-style-name=""><text:span text:style-name="a307" text:class-names="">Logique métier</text:span><text:span text:style-name="a308" text:class-names=""/></text:p>
          <text:p text:style-name="a312" text:class-names="" text:cond-style-name=""><text:span text:style-name="a310" text:class-names="">Anti-chevauchement</text:span><text:span text:style-name="a311" text:class-names=""/></text:p>
          <draw:enhanced-geometry xmlns:dr3d="urn:oasis:names:tc:opendocument:xmlns:dr3d:1.0" draw:type="non-primitive" svg:viewBox="0 0 21600 21600" draw:enhanced-path="M 0 0 L 21600 0 21600 21600 0 21600 Z N"/>
        </draw:custom-shape>
        <draw:custom-shape svg:x="7.2in" svg:y="1.6in" svg:width="2.5in" svg:height="3.3in" draw:id="id75" draw:style-name="a314" draw:name="Shape 13">
          <svg:title/>
          <svg:desc/>
          <draw:enhanced-geometry xmlns:dr3d="urn:oasis:names:tc:opendocument:xmlns:dr3d:1.0" draw:type="non-primitive" svg:viewBox="0 0 21600 21600" draw:enhanced-path="M 0 0 L 21600 0 21600 21600 0 21600 Z N"/>
        </draw:custom-shape>
        <draw:custom-shape svg:x="7.2in" svg:y="1.6in" svg:width="2.5in" svg:height="0.55in" draw:id="id76" draw:style-name="a315" draw:name="Shape 14">
          <svg:title/>
          <svg:desc/>
          <draw:enhanced-geometry xmlns:dr3d="urn:oasis:names:tc:opendocument:xmlns:dr3d:1.0" draw:type="non-primitive" svg:viewBox="0 0 21600 21600" draw:enhanced-path="M 0 0 L 21600 0 21600 21600 0 21600 Z N"/>
        </draw:custom-shape>
        <draw:custom-shape svg:x="7.2in" svg:y="1.6in" svg:width="2.5in" svg:height="0.55in" draw:id="id77" draw:style-name="a319" draw:name="Text 15">
          <svg:title/>
          <svg:desc/>
          <text:p text:style-name="a318" text:class-names="" text:cond-style-name=""><text:span text:style-name="a316" text:class-names="">TEMPLATE</text:span><text:span text:style-name="a317" text:class-names=""/></text:p>
          <draw:enhanced-geometry xmlns:dr3d="urn:oasis:names:tc:opendocument:xmlns:dr3d:1.0" draw:type="non-primitive" svg:viewBox="0 0 21600 21600" draw:enhanced-path="M 0 0 L 21600 0 21600 21600 0 21600 Z N"/>
        </draw:custom-shape>
        <draw:custom-shape svg:x="7.2in" svg:y="2.25in" svg:width="2.5in" svg:height="0.36in" draw:id="id78" draw:style-name="a323" draw:name="Text 16">
          <svg:title/>
          <svg:desc/>
          <text:p text:style-name="a322" text:class-names="" text:cond-style-name=""><text:span text:style-name="a320" text:class-names="">templates/</text:span><text:span text:style-name="a321" text:class-names=""/></text:p>
          <draw:enhanced-geometry xmlns:dr3d="urn:oasis:names:tc:opendocument:xmlns:dr3d:1.0" draw:type="non-primitive" svg:viewBox="0 0 21600 21600" draw:enhanced-path="M 0 0 L 21600 0 21600 21600 0 21600 Z N"/>
        </draw:custom-shape>
        <draw:custom-shape svg:x="7.35in" svg:y="2.7in" svg:width="2.2in" svg:height="2in" draw:id="id79" draw:style-name="a333" draw:name="Text 17">
          <svg:title/>
          <svg:desc/>
          <text:p text:style-name="a326" text:class-names="" text:cond-style-name=""><text:span text:style-name="a324" text:class-names="">7 templates HTML</text:span><text:span text:style-name="a325" text:class-names=""/></text:p>
          <text:p text:style-name="a329" text:class-names="" text:cond-style-name=""><text:span text:style-name="a327" text:class-names="">Bootstrap<text:s text:c="1"/></text:span><text:span text:style-name="a328" text:class-names=""/></text:p>
          <text:p text:style-name="a332" text:class-names="" text:cond-style-name=""><text:span text:style-name="a330" text:class-names="">Responsive design</text:span><text:span text:style-name="a331" text:class-names=""/></text:p>
          <draw:enhanced-geometry xmlns:dr3d="urn:oasis:names:tc:opendocument:xmlns:dr3d:1.0" draw:type="non-primitive" svg:viewBox="0 0 21600 21600" draw:enhanced-path="M 0 0 L 21600 0 21600 21600 0 21600 Z N"/>
        </draw:custom-shape>
        <draw:custom-shape svg:x="2.9in" svg:y="3.25in" svg:width="0.9in" svg:height="0in" draw:id="id80" draw:style-name="a335" draw:name="Shape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3in" svg:y="3.25in" svg:width="0.9in" svg:height="0in" draw:id="id81" draw:style-name="a337" draw:name="Shape 1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5in" svg:y="3.1in" svg:width="0.3in" svg:height="0.3in" draw:id="id82" draw:style-name="a341" draw:name="Text 20">
          <svg:title/>
          <svg:desc/>
          <text:p text:style-name="a340" text:class-names="" text:cond-style-name=""><text:span text:style-name="a338" text:class-names="">→</text:span><text:span text:style-name="a339" text:class-names=""/></text:p>
          <draw:enhanced-geometry xmlns:dr3d="urn:oasis:names:tc:opendocument:xmlns:dr3d:1.0" draw:type="non-primitive" svg:viewBox="0 0 21600 21600" draw:enhanced-path="M 0 0 L 21600 0 21600 21600 0 21600 Z N"/>
        </draw:custom-shape>
        <draw:custom-shape svg:x="6.9in" svg:y="3.1in" svg:width="0.3in" svg:height="0.3in" draw:id="id83" draw:style-name="a345" draw:name="Text 21">
          <svg:title/>
          <svg:desc/>
          <text:p text:style-name="a344" text:class-names="" text:cond-style-name=""><text:span text:style-name="a342" text:class-names="">→</text:span><text:span text:style-name="a343" text:class-names=""/></text:p>
          <draw:enhanced-geometry xmlns:dr3d="urn:oasis:names:tc:opendocument:xmlns:dr3d:1.0" draw:type="non-primitive" svg:viewBox="0 0 21600 21600" draw:enhanced-path="M 0 0 L 21600 0 21600 21600 0 21600 Z N"/>
        </draw:custom-shape>
        <presentation:notes draw:style-name="a353">
          <draw:page-thumbnail draw:page-number="4" svg:x="-0.1875in" svg:y="1.25in" svg:width="6in" svg:height="3.375in" presentation:class="page" draw:id="id84" presentation:style-name="a346" draw:name="Slide Image Placeholder 1">
            <svg:title/>
            <svg:desc/>
          </draw:page-thumbnail>
          <draw:frame draw:id="id85" presentation:style-name="a349" draw:name="Notes Placeholder 2" svg:x="0.5625in" svg:y="4.8125in" svg:width="4.5in" svg:height="3.9375in" presentation:class="notes" presentation:placeholder="false">
            <draw:text-box>
              <text:p text:style-name="a348" text:class-names="" text:cond-style-name=""><text:span text:style-name="a347" text:class-names="">Django suit le pattern MVT — Model, View, Template. Le Model définit les données via l'ORM, la View contient toute la logique métier incluant l'anti-chevauchement, et les Templates rendent l'interface Bootstrap. SQLite est la base de données pour ce prototype.</text:span></text:p>
            </draw:text-box>
            <svg:title/>
            <svg:desc/>
          </draw:frame>
          <draw:frame draw:id="id86" presentation:style-name="a352" draw:name="Slide Number Placeholder 3" svg:x="3.18576in" svg:y="9.49826in" svg:width="2.4375in" svg:height="0.50174in" presentation:class="page-number" presentation:placeholder="false">
            <draw:text-box>
              <text:p text:style-name="a351" text:class-names="" text:cond-style-name=""><text:span text:style-name="a350" text:class-names=""><text:page-number style:num-format="1" text:fixed="false">4</text:page-number></text:span></text:p>
            </draw:text-box>
            <svg:title/>
            <svg:desc/>
          </draw:frame>
        </presentation:notes>
      </draw:page>
      <draw:page draw:name="Slide 5" draw:style-name="a354" draw:master-page-name="Master1-Layout1-cust-DEFAULT" presentation:presentation-page-layout-name="Master1-PPL1" draw:id="Slide-260">
        <draw:custom-shape svg:x="0in" svg:y="0in" svg:width="10in" svg:height="0.08in" draw:id="id87" draw:style-name="a355"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88" draw:style-name="a359" draw:name="Text 1">
          <svg:title/>
          <svg:desc/>
          <text:p text:style-name="a358" text:class-names="" text:cond-style-name=""><text:span text:style-name="a356" text:class-names="">04 — MODÈLE DE DONNÉES</text:span><text:span text:style-name="a357" text:class-names=""/></text:p>
          <draw:enhanced-geometry xmlns:dr3d="urn:oasis:names:tc:opendocument:xmlns:dr3d:1.0" draw:type="non-primitive" svg:viewBox="0 0 21600 21600" draw:enhanced-path="M 0 0 L 21600 0 21600 21600 0 21600 Z N"/>
        </draw:custom-shape>
        <draw:custom-shape svg:x="0.5in" svg:y="0.65in" svg:width="7in" svg:height="0.6in" draw:id="id89" draw:style-name="a363" draw:name="Text 2">
          <svg:title/>
          <svg:desc/>
          <text:p text:style-name="a362" text:class-names="" text:cond-style-name=""><text:span text:style-name="a360" text:class-names="">4 Entités Clés</text:span><text:span text:style-name="a361" text:class-names=""/></text:p>
          <draw:enhanced-geometry xmlns:dr3d="urn:oasis:names:tc:opendocument:xmlns:dr3d:1.0" draw:type="non-primitive" svg:viewBox="0 0 21600 21600" draw:enhanced-path="M 0 0 L 21600 0 21600 21600 0 21600 Z N"/>
        </draw:custom-shape>
        <draw:custom-shape svg:x="0.4in" svg:y="1.58in" svg:width="4.5in" svg:height="1.6in" draw:id="id90" draw:style-name="a364" draw:name="Shape 3">
          <svg:title/>
          <svg:desc/>
          <draw:enhanced-geometry xmlns:dr3d="urn:oasis:names:tc:opendocument:xmlns:dr3d:1.0" draw:type="non-primitive" svg:viewBox="0 0 21600 21600" draw:enhanced-path="M 0 0 L 21600 0 21600 21600 0 21600 Z N"/>
        </draw:custom-shape>
        <draw:custom-shape svg:x="0.4in" svg:y="1.58in" svg:width="4.5in" svg:height="0.42in" draw:id="id91" draw:style-name="a365" draw:name="Shape 4">
          <svg:title/>
          <svg:desc/>
          <draw:enhanced-geometry xmlns:dr3d="urn:oasis:names:tc:opendocument:xmlns:dr3d:1.0" draw:type="non-primitive" svg:viewBox="0 0 21600 21600" draw:enhanced-path="M 0 0 L 21600 0 21600 21600 0 21600 Z N"/>
        </draw:custom-shape>
        <draw:custom-shape svg:x="0.4in" svg:y="1.58in" svg:width="4.5in" svg:height="0.42in" draw:id="id92" draw:style-name="a369" draw:name="Text 5">
          <svg:title/>
          <svg:desc/>
          <text:p text:style-name="a368" text:class-names="" text:cond-style-name=""><text:span text:style-name="a366" text:class-names=""><text:s text:c="1"/>Sport</text:span><text:span text:style-name="a367" text:class-names=""/></text:p>
          <draw:enhanced-geometry xmlns:dr3d="urn:oasis:names:tc:opendocument:xmlns:dr3d:1.0" draw:type="non-primitive" svg:viewBox="0 0 21600 21600" draw:enhanced-path="M 0 0 L 21600 0 21600 21600 0 21600 Z N"/>
        </draw:custom-shape>
        <draw:custom-shape svg:x="0.55in" svg:y="2.06in" svg:width="2.8in" svg:height="1in" draw:id="id93" draw:style-name="a376" draw:name="Text 6">
          <svg:title/>
          <svg:desc/>
          <text:p text:style-name="a372" text:class-names="" text:cond-style-name=""><text:span text:style-name="a370" text:class-names="">nom_sport: CharField</text:span><text:span text:style-name="a371" text:class-names=""/></text:p>
          <text:p text:style-name="a375" text:class-names="" text:cond-style-name=""><text:span text:style-name="a373" text:class-names="">capacite_max: IntegerField</text:span><text:span text:style-name="a374" text:class-names=""/></text:p>
          <draw:enhanced-geometry xmlns:dr3d="urn:oasis:names:tc:opendocument:xmlns:dr3d:1.0" draw:type="non-primitive" svg:viewBox="0 0 21600 21600" draw:enhanced-path="M 0 0 L 21600 0 21600 21600 0 21600 Z N"/>
        </draw:custom-shape>
        <draw:custom-shape svg:x="3.4in" svg:y="2.13in" svg:width="1.35in" svg:height="0.45in" draw:id="id94" draw:style-name="a377" draw:name="Shape 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8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4in" svg:y="2.13in" svg:width="1.35in" svg:height="0.45in" draw:id="id95" draw:style-name="a381" draw:name="Text 8">
          <svg:title/>
          <svg:desc/>
          <text:p text:style-name="a380" text:class-names="" text:cond-style-name=""><text:span text:style-name="a378" text:class-names="">Protégé à la suppression</text:span><text:span text:style-name="a379" text:class-names=""/></text:p>
          <draw:enhanced-geometry xmlns:dr3d="urn:oasis:names:tc:opendocument:xmlns:dr3d:1.0" draw:type="non-primitive" svg:viewBox="0 0 21600 21600" draw:enhanced-path="M 0 0 L 21600 0 21600 21600 0 21600 Z N"/>
        </draw:custom-shape>
        <draw:custom-shape svg:x="5.1in" svg:y="1.58in" svg:width="4.5in" svg:height="1.6in" draw:id="id96" draw:style-name="a382" draw:name="Shape 9">
          <svg:title/>
          <svg:desc/>
          <draw:enhanced-geometry xmlns:dr3d="urn:oasis:names:tc:opendocument:xmlns:dr3d:1.0" draw:type="non-primitive" svg:viewBox="0 0 21600 21600" draw:enhanced-path="M 0 0 L 21600 0 21600 21600 0 21600 Z N"/>
        </draw:custom-shape>
        <draw:custom-shape svg:x="5.1in" svg:y="1.58in" svg:width="4.5in" svg:height="0.42in" draw:id="id97" draw:style-name="a383" draw:name="Shape 10">
          <svg:title/>
          <svg:desc/>
          <draw:enhanced-geometry xmlns:dr3d="urn:oasis:names:tc:opendocument:xmlns:dr3d:1.0" draw:type="non-primitive" svg:viewBox="0 0 21600 21600" draw:enhanced-path="M 0 0 L 21600 0 21600 21600 0 21600 Z N"/>
        </draw:custom-shape>
        <draw:custom-shape svg:x="5.1in" svg:y="1.58in" svg:width="4.5in" svg:height="0.42in" draw:id="id98" draw:style-name="a387" draw:name="Text 11">
          <svg:title/>
          <svg:desc/>
          <text:p text:style-name="a386" text:class-names="" text:cond-style-name=""><text:span text:style-name="a384" text:class-names=""><text:s text:c="2"/>Terrain</text:span><text:span text:style-name="a385" text:class-names=""/></text:p>
          <draw:enhanced-geometry xmlns:dr3d="urn:oasis:names:tc:opendocument:xmlns:dr3d:1.0" draw:type="non-primitive" svg:viewBox="0 0 21600 21600" draw:enhanced-path="M 0 0 L 21600 0 21600 21600 0 21600 Z N"/>
        </draw:custom-shape>
        <draw:custom-shape svg:x="5.25in" svg:y="2.06in" svg:width="2.8in" svg:height="1in" draw:id="id99" draw:style-name="a397" draw:name="Text 12">
          <svg:title/>
          <svg:desc/>
          <text:p text:style-name="a390" text:class-names="" text:cond-style-name=""><text:span text:style-name="a388" text:class-names="">nom: CharField</text:span><text:span text:style-name="a389" text:class-names=""/></text:p>
          <text:p text:style-name="a393" text:class-names="" text:cond-style-name=""><text:span text:style-name="a391" text:class-names="">type_surface: CharField</text:span><text:span text:style-name="a392" text:class-names=""/></text:p>
          <text:p text:style-name="a396" text:class-names="" text:cond-style-name=""><text:span text:style-name="a394" text:class-names="">disponibilite: BooleanField</text:span><text:span text:style-name="a395" text:class-names=""/></text:p>
          <draw:enhanced-geometry xmlns:dr3d="urn:oasis:names:tc:opendocument:xmlns:dr3d:1.0" draw:type="non-primitive" svg:viewBox="0 0 21600 21600" draw:enhanced-path="M 0 0 L 21600 0 21600 21600 0 21600 Z N"/>
        </draw:custom-shape>
        <draw:custom-shape svg:x="8.08295in" svg:y="2.10727in" svg:width="1.38977in" svg:height="0.48977in" draw:id="id100" draw:style-name="a398" draw:name="Shape 1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8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08864in" svg:y="2.11295in" svg:width="1.37841in" svg:height="0.47841in" draw:id="id101" draw:style-name="a405" draw:name="Text 14">
          <svg:title/>
          <svg:desc/>
          <text:p text:style-name="a400" text:class-names="" text:cond-style-name=""><text:span text:style-name="a399" text:class-names="">4 types de surface</text:span></text:p>
          <text:p text:style-name="a404" text:class-names="" text:cond-style-name=""><text:span text:style-name="a401" text:class-names="">Gazon,Synthétique,Parquet</text:span><text:span text:style-name="a402" text:class-names="">,<text:line-break/>Terre battue</text:span><text:span text:style-name="a403" text:class-names=""/></text:p>
          <draw:enhanced-geometry xmlns:dr3d="urn:oasis:names:tc:opendocument:xmlns:dr3d:1.0" draw:type="non-primitive" svg:viewBox="0 0 21600 21600" draw:enhanced-path="M 0 0 L 21600 0 21600 21600 0 21600 Z N"/>
        </draw:custom-shape>
        <draw:custom-shape svg:x="0.4in" svg:y="3.4in" svg:width="4.5in" svg:height="1.6in" draw:id="id102" draw:style-name="a406" draw:name="Shape 15">
          <svg:title/>
          <svg:desc/>
          <draw:enhanced-geometry xmlns:dr3d="urn:oasis:names:tc:opendocument:xmlns:dr3d:1.0" draw:type="non-primitive" svg:viewBox="0 0 21600 21600" draw:enhanced-path="M 0 0 L 21600 0 21600 21600 0 21600 Z N"/>
        </draw:custom-shape>
        <draw:custom-shape svg:x="0.4in" svg:y="3.4in" svg:width="4.5in" svg:height="0.42in" draw:id="id103" draw:style-name="a407" draw:name="Shape 16">
          <svg:title/>
          <svg:desc/>
          <draw:enhanced-geometry xmlns:dr3d="urn:oasis:names:tc:opendocument:xmlns:dr3d:1.0" draw:type="non-primitive" svg:viewBox="0 0 21600 21600" draw:enhanced-path="M 0 0 L 21600 0 21600 21600 0 21600 Z N"/>
        </draw:custom-shape>
        <draw:custom-shape svg:x="0.4in" svg:y="3.4in" svg:width="4.5in" svg:height="0.42in" draw:id="id104" draw:style-name="a412" draw:name="Text 17">
          <svg:title/>
          <svg:desc/>
          <text:p text:style-name="a411" text:class-names="" text:cond-style-name=""><text:span text:style-name="a408" text:class-names=""><text:s text:c="2"/></text:span><text:span text:style-name="a409" text:class-names="">Joueur</text:span><text:span text:style-name="a410" text:class-names=""/></text:p>
          <draw:enhanced-geometry xmlns:dr3d="urn:oasis:names:tc:opendocument:xmlns:dr3d:1.0" draw:type="non-primitive" svg:viewBox="0 0 21600 21600" draw:enhanced-path="M 0 0 L 21600 0 21600 21600 0 21600 Z N"/>
        </draw:custom-shape>
        <draw:custom-shape svg:x="0.55in" svg:y="3.88in" svg:width="2.8in" svg:height="1in" draw:id="id105" draw:style-name="a419" draw:name="Text 18">
          <svg:title/>
          <svg:desc/>
          <text:p text:style-name="a415" text:class-names="" text:cond-style-name=""><text:span text:style-name="a413" text:class-names="">nom: CharField</text:span><text:span text:style-name="a414" text:class-names=""/></text:p>
          <text:p text:style-name="a418" text:class-names="" text:cond-style-name=""><text:span text:style-name="a416" text:class-names="">telephone: CharField</text:span><text:span text:style-name="a417" text:class-names=""/></text:p>
          <draw:enhanced-geometry xmlns:dr3d="urn:oasis:names:tc:opendocument:xmlns:dr3d:1.0" draw:type="non-primitive" svg:viewBox="0 0 21600 21600" draw:enhanced-path="M 0 0 L 21600 0 21600 21600 0 21600 Z N"/>
        </draw:custom-shape>
        <draw:custom-shape svg:x="3.4in" svg:y="3.95in" svg:width="1.35in" svg:height="0.45in" draw:id="id106" draw:style-name="a420" draw:name="Shape 1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8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4in" svg:y="3.95in" svg:width="1.35in" svg:height="0.45in" draw:id="id107" draw:style-name="a425" draw:name="Text 20">
          <svg:title/>
          <svg:desc/>
          <text:p text:style-name="a424" text:class-names="" text:cond-style-name=""><text:span text:style-name="a421" text:class-names="">Identification<text:s text:c="1"/></text:span><text:span text:style-name="a422" text:class-names="">joueur</text:span><text:span text:style-name="a423" text:class-names=""/></text:p>
          <draw:enhanced-geometry xmlns:dr3d="urn:oasis:names:tc:opendocument:xmlns:dr3d:1.0" draw:type="non-primitive" svg:viewBox="0 0 21600 21600" draw:enhanced-path="M 0 0 L 21600 0 21600 21600 0 21600 Z N"/>
        </draw:custom-shape>
        <draw:custom-shape svg:x="5.1in" svg:y="3.4in" svg:width="4.5in" svg:height="1.6in" draw:id="id108" draw:style-name="a426" draw:name="Shape 21">
          <svg:title/>
          <svg:desc/>
          <draw:enhanced-geometry xmlns:dr3d="urn:oasis:names:tc:opendocument:xmlns:dr3d:1.0" draw:type="non-primitive" svg:viewBox="0 0 21600 21600" draw:enhanced-path="M 0 0 L 21600 0 21600 21600 0 21600 Z N"/>
        </draw:custom-shape>
        <draw:custom-shape svg:x="5.1in" svg:y="3.4in" svg:width="4.5in" svg:height="0.42in" draw:id="id109" draw:style-name="a427" draw:name="Shape 22">
          <svg:title/>
          <svg:desc/>
          <draw:enhanced-geometry xmlns:dr3d="urn:oasis:names:tc:opendocument:xmlns:dr3d:1.0" draw:type="non-primitive" svg:viewBox="0 0 21600 21600" draw:enhanced-path="M 0 0 L 21600 0 21600 21600 0 21600 Z N"/>
        </draw:custom-shape>
        <draw:custom-shape svg:x="5.1in" svg:y="3.4in" svg:width="4.5in" svg:height="0.42in" draw:id="id110" draw:style-name="a431" draw:name="Text 23">
          <svg:title/>
          <svg:desc/>
          <text:p text:style-name="a430" text:class-names="" text:cond-style-name=""><text:span text:style-name="a428" text:class-names=""><text:s text:c="1"/>Reservation</text:span><text:span text:style-name="a429" text:class-names=""/></text:p>
          <draw:enhanced-geometry xmlns:dr3d="urn:oasis:names:tc:opendocument:xmlns:dr3d:1.0" draw:type="non-primitive" svg:viewBox="0 0 21600 21600" draw:enhanced-path="M 0 0 L 21600 0 21600 21600 0 21600 Z N"/>
        </draw:custom-shape>
        <draw:custom-shape svg:x="5.25in" svg:y="3.88in" svg:width="2.8in" svg:height="1in" draw:id="id111" draw:style-name="a441" draw:name="Text 24">
          <svg:title/>
          <svg:desc/>
          <text:p text:style-name="a434" text:class-names="" text:cond-style-name=""><text:span text:style-name="a432" text:class-names="">date_reservation: DateField</text:span><text:span text:style-name="a433" text:class-names=""/></text:p>
          <text:p text:style-name="a437" text:class-names="" text:cond-style-name=""><text:span text:style-name="a435" text:class-names="">heure_debut: TimeField</text:span><text:span text:style-name="a436" text:class-names=""/></text:p>
          <text:p text:style-name="a440" text:class-names="" text:cond-style-name=""><text:span text:style-name="a438" text:class-names="">duree: PositiveIntegerField</text:span><text:span text:style-name="a439" text:class-names=""/></text:p>
          <draw:enhanced-geometry xmlns:dr3d="urn:oasis:names:tc:opendocument:xmlns:dr3d:1.0" draw:type="non-primitive" svg:viewBox="0 0 21600 21600" draw:enhanced-path="M 0 0 L 21600 0 21600 21600 0 21600 Z N"/>
        </draw:custom-shape>
        <draw:custom-shape svg:x="8.1in" svg:y="3.95in" svg:width="1.35in" svg:height="0.45in" draw:id="id112" draw:style-name="a442" draw:name="Shape 2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8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1in" svg:y="3.95in" svg:width="1.35in" svg:height="0.45in" draw:id="id113" draw:style-name="a446" draw:name="Text 26">
          <svg:title/>
          <svg:desc/>
          <text:p text:style-name="a445" text:class-names="" text:cond-style-name=""><text:span text:style-name="a443" text:class-names="">Anti-chevauchement</text:span><text:span text:style-name="a444" text:class-names=""/></text:p>
          <draw:enhanced-geometry xmlns:dr3d="urn:oasis:names:tc:opendocument:xmlns:dr3d:1.0" draw:type="non-primitive" svg:viewBox="0 0 21600 21600" draw:enhanced-path="M 0 0 L 21600 0 21600 21600 0 21600 Z N"/>
        </draw:custom-shape>
        <draw:custom-shape svg:x="4.9in" svg:y="2.45in" svg:width="0.2in" svg:height="0in" draw:id="id114" draw:style-name="a447" draw:name="Shape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draw:style-name="a455">
          <draw:page-thumbnail draw:page-number="5" svg:x="-0.1875in" svg:y="1.25in" svg:width="6in" svg:height="3.375in" presentation:class="page" draw:id="id115" presentation:style-name="a448" draw:name="Slide Image Placeholder 1">
            <svg:title/>
            <svg:desc/>
          </draw:page-thumbnail>
          <draw:frame draw:id="id116" presentation:style-name="a451" draw:name="Notes Placeholder 2" svg:x="0.5625in" svg:y="4.8125in" svg:width="4.5in" svg:height="3.9375in" presentation:class="notes" presentation:placeholder="false">
            <draw:text-box>
              <text:p text:style-name="a450" text:class-names="" text:cond-style-name=""><text:span text:style-name="a449" text:class-names="">Le schéma de données repose sur 4 modèles Django liés par des clés étrangères. Sport est au sommet de la hiérarchie. Terrain dépend de Sport. Reservation lie Terrain et Joueur, et c'est sur ce modèle que repose la logique anti-chevauchement.</text:span></text:p>
            </draw:text-box>
            <svg:title/>
            <svg:desc/>
          </draw:frame>
          <draw:frame draw:id="id117" presentation:style-name="a454" draw:name="Slide Number Placeholder 3" svg:x="3.18576in" svg:y="9.49826in" svg:width="2.4375in" svg:height="0.50174in" presentation:class="page-number" presentation:placeholder="false">
            <draw:text-box>
              <text:p text:style-name="a453" text:class-names="" text:cond-style-name=""><text:span text:style-name="a452" text:class-names=""><text:page-number style:num-format="1" text:fixed="false">5</text:page-number></text:span></text:p>
            </draw:text-box>
            <svg:title/>
            <svg:desc/>
          </draw:frame>
        </presentation:notes>
      </draw:page>
      <draw:page draw:name="Slide 6" draw:style-name="a456" draw:master-page-name="Master1-Layout1-cust-DEFAULT" presentation:presentation-page-layout-name="Master1-PPL1" draw:id="Slide-261">
        <draw:custom-shape svg:x="0in" svg:y="0in" svg:width="10in" svg:height="0.08in" draw:id="id118" draw:style-name="a457"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119" draw:style-name="a461" draw:name="Text 1">
          <svg:title/>
          <svg:desc/>
          <text:p text:style-name="a460" text:class-names="" text:cond-style-name=""><text:span text:style-name="a458" text:class-names="">05 — LOGIQUE MÉTIER</text:span><text:span text:style-name="a459" text:class-names=""/></text:p>
          <draw:enhanced-geometry xmlns:dr3d="urn:oasis:names:tc:opendocument:xmlns:dr3d:1.0" draw:type="non-primitive" svg:viewBox="0 0 21600 21600" draw:enhanced-path="M 0 0 L 21600 0 21600 21600 0 21600 Z N"/>
        </draw:custom-shape>
        <draw:custom-shape svg:x="0.5in" svg:y="0.65in" svg:width="9in" svg:height="0.6in" draw:id="id120" draw:style-name="a465" draw:name="Text 2">
          <svg:title/>
          <svg:desc/>
          <text:p text:style-name="a464" text:class-names="" text:cond-style-name=""><text:span text:style-name="a462" text:class-names="">Double Protection Anti-Chevauchement</text:span><text:span text:style-name="a463" text:class-names=""/></text:p>
          <draw:enhanced-geometry xmlns:dr3d="urn:oasis:names:tc:opendocument:xmlns:dr3d:1.0" draw:type="non-primitive" svg:viewBox="0 0 21600 21600" draw:enhanced-path="M 0 0 L 21600 0 21600 21600 0 21600 Z N"/>
        </draw:custom-shape>
        <draw:custom-shape svg:x="0.4in" svg:y="1.55in" svg:width="4.3in" svg:height="3.5in" draw:id="id121" draw:style-name="a466" draw:name="Shape 3">
          <svg:title/>
          <svg:desc/>
          <draw:enhanced-geometry xmlns:dr3d="urn:oasis:names:tc:opendocument:xmlns:dr3d:1.0" draw:type="non-primitive" svg:viewBox="0 0 21600 21600" draw:enhanced-path="M 0 0 L 21600 0 21600 21600 0 21600 Z N"/>
        </draw:custom-shape>
        <draw:custom-shape svg:x="0.4in" svg:y="1.55in" svg:width="4.3in" svg:height="0.5in" draw:id="id122" draw:style-name="a467" draw:name="Shape 4">
          <svg:title/>
          <svg:desc/>
          <draw:enhanced-geometry xmlns:dr3d="urn:oasis:names:tc:opendocument:xmlns:dr3d:1.0" draw:type="non-primitive" svg:viewBox="0 0 21600 21600" draw:enhanced-path="M 0 0 L 21600 0 21600 21600 0 21600 Z N"/>
        </draw:custom-shape>
        <draw:custom-shape svg:x="0.4in" svg:y="1.55in" svg:width="4.3in" svg:height="0.5in" draw:id="id123" draw:style-name="a471" draw:name="Text 5">
          <svg:title/>
          <svg:desc/>
          <text:p text:style-name="a470" text:class-names="" text:cond-style-name=""><text:span text:style-name="a468" text:class-names="">NIVEAU 1 — forms.py</text:span><text:span text:style-name="a469" text:class-names=""/></text:p>
          <draw:enhanced-geometry xmlns:dr3d="urn:oasis:names:tc:opendocument:xmlns:dr3d:1.0" draw:type="non-primitive" svg:viewBox="0 0 21600 21600" draw:enhanced-path="M 0 0 L 21600 0 21600 21600 0 21600 Z N"/>
        </draw:custom-shape>
        <draw:custom-shape svg:x="0.4in" svg:y="2.12in" svg:width="4.3in" svg:height="0.35in" draw:id="id124" draw:style-name="a475" draw:name="Text 6">
          <svg:title/>
          <svg:desc/>
          <text:p text:style-name="a474" text:class-names="" text:cond-style-name=""><text:span text:style-name="a472" text:class-names="">Validation Formulaire</text:span><text:span text:style-name="a473" text:class-names=""/></text:p>
          <draw:enhanced-geometry xmlns:dr3d="urn:oasis:names:tc:opendocument:xmlns:dr3d:1.0" draw:type="non-primitive" svg:viewBox="0 0 21600 21600" draw:enhanced-path="M 0 0 L 21600 0 21600 21600 0 21600 Z N"/>
        </draw:custom-shape>
        <draw:custom-shape svg:x="0.6in" svg:y="2.55in" svg:width="3.9in" svg:height="2.2in" draw:id="id125" draw:style-name="a501" draw:name="Text 7">
          <svg:title/>
          <svg:desc/>
          <text:list text:style-name="a482">
            <text:list-item>
              <text:p text:style-name="a481" text:class-names="" text:cond-style-name=""><text:span text:style-name="a476" text:class-names="">Vérifie</text:span><text:span text:style-name="a477" text:class-names=""><text:s text:c="1"/>avant<text:s text:c="1"/></text:span><text:span text:style-name="a478" text:class-names="">soumission</text:span><text:span text:style-name="a479" text:class-names=""><text:s text:c="1"/>BDD</text:span><text:span text:style-name="a480" text:class-names=""/></text:p>
            </text:list-item>
          </text:list>
          <text:list text:style-name="a490">
            <text:list-item>
              <text:p text:style-name="a489" text:class-names="" text:cond-style-name=""><text:span text:style-name="a483" text:class-names="">Retourne</text:span><text:span text:style-name="a484" text:class-names=""><text:s text:c="1"/>un message<text:s text:c="1"/></text:span><text:span text:style-name="a485" text:class-names="">d'erreur</text:span><text:span text:style-name="a486" text:class-names=""><text:s text:c="1"/></text:span><text:span text:style-name="a487" text:class-names="">lisible</text:span><text:span text:style-name="a488" text:class-names=""/></text:p>
            </text:list-item>
          </text:list>
          <text:list text:style-name="a500">
            <text:list-item>
              <text:p text:style-name="a499" text:class-names="" text:cond-style-name=""><text:span text:style-name="a491" text:class-names="">Indique</text:span><text:span text:style-name="a492" text:class-names=""><text:s text:c="1"/></text:span><text:span text:style-name="a493" text:class-names="">l'heure</text:span><text:span text:style-name="a494" text:class-names=""><text:s text:c="1"/></text:span><text:span text:style-name="a495" text:class-names="">exacte</text:span><text:span text:style-name="a496" text:class-names=""><text:s text:c="1"/>du<text:s text:c="1"/></text:span><text:span text:style-name="a497" text:class-names="">conflit</text:span><text:span text:style-name="a498" text:class-names=""/></text:p>
            </text:list-item>
          </text:list>
          <draw:enhanced-geometry xmlns:dr3d="urn:oasis:names:tc:opendocument:xmlns:dr3d:1.0" draw:type="non-primitive" svg:viewBox="0 0 21600 21600" draw:enhanced-path="M 0 0 L 21600 0 21600 21600 0 21600 Z N"/>
        </draw:custom-shape>
        <draw:custom-shape svg:x="4.55in" svg:y="2.8in" svg:width="0.9in" svg:height="0.9in" draw:id="id126" draw:style-name="a502" draw:name="Shape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55in" svg:y="2.8in" svg:width="0.9in" svg:height="0.9in" draw:id="id127" draw:style-name="a506" draw:name="Text 9">
          <svg:title/>
          <svg:desc/>
          <text:p text:style-name="a505" text:class-names="" text:cond-style-name=""><text:span text:style-name="a503" text:class-names="">+</text:span><text:span text:style-name="a504" text:class-names=""/></text:p>
          <draw:enhanced-geometry xmlns:dr3d="urn:oasis:names:tc:opendocument:xmlns:dr3d:1.0" draw:type="non-primitive" svg:viewBox="0 0 21600 21600" draw:enhanced-path="M 0 0 L 21600 0 21600 21600 0 21600 Z N"/>
        </draw:custom-shape>
        <draw:custom-shape svg:x="5.3in" svg:y="1.55in" svg:width="4.3in" svg:height="3.5in" draw:id="id128" draw:style-name="a507" draw:name="Shape 10">
          <svg:title/>
          <svg:desc/>
          <draw:enhanced-geometry xmlns:dr3d="urn:oasis:names:tc:opendocument:xmlns:dr3d:1.0" draw:type="non-primitive" svg:viewBox="0 0 21600 21600" draw:enhanced-path="M 0 0 L 21600 0 21600 21600 0 21600 Z N"/>
        </draw:custom-shape>
        <draw:custom-shape svg:x="5.3in" svg:y="1.55in" svg:width="4.3in" svg:height="0.5in" draw:id="id129" draw:style-name="a508" draw:name="Shape 11">
          <svg:title/>
          <svg:desc/>
          <draw:enhanced-geometry xmlns:dr3d="urn:oasis:names:tc:opendocument:xmlns:dr3d:1.0" draw:type="non-primitive" svg:viewBox="0 0 21600 21600" draw:enhanced-path="M 0 0 L 21600 0 21600 21600 0 21600 Z N"/>
        </draw:custom-shape>
        <draw:custom-shape svg:x="5.3in" svg:y="1.55in" svg:width="4.3in" svg:height="0.5in" draw:id="id130" draw:style-name="a512" draw:name="Text 12">
          <svg:title/>
          <svg:desc/>
          <text:p text:style-name="a511" text:class-names="" text:cond-style-name=""><text:span text:style-name="a509" text:class-names="">NIVEAU 2 — models.py</text:span><text:span text:style-name="a510" text:class-names=""/></text:p>
          <draw:enhanced-geometry xmlns:dr3d="urn:oasis:names:tc:opendocument:xmlns:dr3d:1.0" draw:type="non-primitive" svg:viewBox="0 0 21600 21600" draw:enhanced-path="M 0 0 L 21600 0 21600 21600 0 21600 Z N"/>
        </draw:custom-shape>
        <draw:custom-shape svg:x="5.3in" svg:y="2.12in" svg:width="4.3in" svg:height="0.35in" draw:id="id131" draw:style-name="a516" draw:name="Text 13">
          <svg:title/>
          <svg:desc/>
          <text:p text:style-name="a515" text:class-names="" text:cond-style-name=""><text:span text:style-name="a513" text:class-names="">Validation ORM (clean/save)</text:span><text:span text:style-name="a514" text:class-names=""/></text:p>
          <draw:enhanced-geometry xmlns:dr3d="urn:oasis:names:tc:opendocument:xmlns:dr3d:1.0" draw:type="non-primitive" svg:viewBox="0 0 21600 21600" draw:enhanced-path="M 0 0 L 21600 0 21600 21600 0 21600 Z N"/>
        </draw:custom-shape>
        <draw:custom-shape svg:x="5.5in" svg:y="2.55in" svg:width="3.9in" svg:height="2.2in" draw:id="id132" draw:style-name="a538" draw:name="Text 14">
          <svg:title/>
          <svg:desc/>
          <text:list text:style-name="a522">
            <text:list-item>
              <text:p text:style-name="a521" text:class-names="" text:cond-style-name=""><text:span text:style-name="a517" text:class-names="">Méthode</text:span><text:span text:style-name="a518" text:class-names=""><text:s text:c="1"/>clean() sur le<text:s text:c="1"/></text:span><text:span text:style-name="a519" text:class-names="">modèle</text:span><text:span text:style-name="a520" text:class-names=""/></text:p>
            </text:list-item>
          </text:list>
          <text:list text:style-name="a529">
            <text:list-item>
              <text:p text:style-name="a528" text:class-names="" text:cond-style-name=""><text:span text:style-name="a523" text:class-names="">Appelée</text:span><text:span text:style-name="a524" text:class-names=""><text:s text:c="1"/></text:span><text:span text:style-name="a525" text:class-names="">automatiquement</text:span><text:span text:style-name="a526" text:class-names=""><text:s text:c="1"/>par save()</text:span><text:span text:style-name="a527" text:class-names=""/></text:p>
            </text:list-item>
          </text:list>
          <text:list text:style-name="a537">
            <text:list-item>
              <text:p text:style-name="a536" text:class-names="" text:cond-style-name=""><text:span text:style-name="a530" text:class-names="">Indépendant</text:span><text:span text:style-name="a531" text:class-names=""><text:s text:c="1"/>de<text:s text:c="1"/></text:span><text:span text:style-name="a532" text:class-names="">l'interface</text:span><text:span text:style-name="a533" text:class-names=""><text:s text:c="1"/></text:span><text:span text:style-name="a534" text:class-names="">utilisée</text:span><text:span text:style-name="a535" text:class-names=""/></text:p>
            </text:list-item>
          </text:list>
          <draw:enhanced-geometry xmlns:dr3d="urn:oasis:names:tc:opendocument:xmlns:dr3d:1.0" draw:type="non-primitive" svg:viewBox="0 0 21600 21600" draw:enhanced-path="M 0 0 L 21600 0 21600 21600 0 21600 Z N"/>
        </draw:custom-shape>
        <presentation:notes draw:style-name="a546">
          <draw:page-thumbnail draw:page-number="6" svg:x="-0.1875in" svg:y="1.25in" svg:width="6in" svg:height="3.375in" presentation:class="page" draw:id="id133" presentation:style-name="a539" draw:name="Slide Image Placeholder 1">
            <svg:title/>
            <svg:desc/>
          </draw:page-thumbnail>
          <draw:frame draw:id="id134" presentation:style-name="a542" draw:name="Notes Placeholder 2" svg:x="0.5625in" svg:y="4.8125in" svg:width="4.5in" svg:height="3.9375in" presentation:class="notes" presentation:placeholder="false">
            <draw:text-box>
              <text:p text:style-name="a541" text:class-names="" text:cond-style-name=""><text:span text:style-name="a540" text:class-names="">La fonctionnalité la plus remarquable de SportField est sa double protection anti-chevauchement. Niveau 1 dans forms.py valide avant la soumission et affiche un message d'erreur clair. Niveau 2 dans models.py agit comme filet de sécurité même lors d'appels directs à l'ORM. Cette approche défensive témoigne d'une vraie maturité technique.</text:span></text:p>
            </draw:text-box>
            <svg:title/>
            <svg:desc/>
          </draw:frame>
          <draw:frame draw:id="id135" presentation:style-name="a545" draw:name="Slide Number Placeholder 3" svg:x="3.18576in" svg:y="9.49826in" svg:width="2.4375in" svg:height="0.50174in" presentation:class="page-number" presentation:placeholder="false">
            <draw:text-box>
              <text:p text:style-name="a544" text:class-names="" text:cond-style-name=""><text:span text:style-name="a543" text:class-names=""><text:page-number style:num-format="1" text:fixed="false">6</text:page-number></text:span></text:p>
            </draw:text-box>
            <svg:title/>
            <svg:desc/>
          </draw:frame>
        </presentation:notes>
      </draw:page>
      <draw:page draw:name="Slide 7" draw:style-name="a547" draw:master-page-name="Master1-Layout1-cust-DEFAULT" presentation:presentation-page-layout-name="Master1-PPL1" draw:id="Slide-262">
        <draw:custom-shape svg:x="0in" svg:y="0in" svg:width="10in" svg:height="0.08in" draw:id="id136" draw:style-name="a548"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137" draw:style-name="a552" draw:name="Text 1">
          <svg:title/>
          <svg:desc/>
          <text:p text:style-name="a551" text:class-names="" text:cond-style-name=""><text:span text:style-name="a549" text:class-names="">06 — VUES &amp; ENDPOINTS</text:span><text:span text:style-name="a550" text:class-names=""/></text:p>
          <draw:enhanced-geometry xmlns:dr3d="urn:oasis:names:tc:opendocument:xmlns:dr3d:1.0" draw:type="non-primitive" svg:viewBox="0 0 21600 21600" draw:enhanced-path="M 0 0 L 21600 0 21600 21600 0 21600 Z N"/>
        </draw:custom-shape>
        <draw:custom-shape svg:x="0.5in" svg:y="0.65in" svg:width="9in" svg:height="0.6in" draw:id="id138" draw:style-name="a556" draw:name="Text 2">
          <svg:title/>
          <svg:desc/>
          <text:p text:style-name="a555" text:class-names="" text:cond-style-name=""><text:span text:style-name="a553" text:class-names="">6 Vues · Parcours Utilisateur Complet</text:span><text:span text:style-name="a554" text:class-names=""/></text:p>
          <draw:enhanced-geometry xmlns:dr3d="urn:oasis:names:tc:opendocument:xmlns:dr3d:1.0" draw:type="non-primitive" svg:viewBox="0 0 21600 21600" draw:enhanced-path="M 0 0 L 21600 0 21600 21600 0 21600 Z N"/>
        </draw:custom-shape>
        <draw:custom-shape svg:x="0.4in" svg:y="1.6in" svg:width="4.5in" svg:height="1.1in" draw:id="id139" draw:style-name="a557" draw:name="Shape 3">
          <svg:title/>
          <svg:desc/>
          <draw:enhanced-geometry xmlns:dr3d="urn:oasis:names:tc:opendocument:xmlns:dr3d:1.0" draw:type="non-primitive" svg:viewBox="0 0 21600 21600" draw:enhanced-path="M 0 0 L 21600 0 21600 21600 0 21600 Z N"/>
        </draw:custom-shape>
        <draw:custom-shape svg:x="0.4in" svg:y="1.6in" svg:width="0.08in" svg:height="1.1in" draw:id="id140" draw:style-name="a558" draw:name="Shape 4">
          <svg:title/>
          <svg:desc/>
          <draw:enhanced-geometry xmlns:dr3d="urn:oasis:names:tc:opendocument:xmlns:dr3d:1.0" draw:type="non-primitive" svg:viewBox="0 0 21600 21600" draw:enhanced-path="M 0 0 L 21600 0 21600 21600 0 21600 Z N"/>
        </draw:custom-shape>
        <draw:custom-shape svg:x="0.58in" svg:y="1.66in" svg:width="2.2in" svg:height="0.3in" draw:id="id141" draw:style-name="a562" draw:name="Text 5">
          <svg:title/>
          <svg:desc/>
          <text:p text:style-name="a561" text:class-names="" text:cond-style-name=""><text:span text:style-name="a559" text:class-names="">/</text:span><text:span text:style-name="a560" text:class-names=""/></text:p>
          <draw:enhanced-geometry xmlns:dr3d="urn:oasis:names:tc:opendocument:xmlns:dr3d:1.0" draw:type="non-primitive" svg:viewBox="0 0 21600 21600" draw:enhanced-path="M 0 0 L 21600 0 21600 21600 0 21600 Z N"/>
        </draw:custom-shape>
        <draw:custom-shape svg:x="2.9in" svg:y="1.7in" svg:width="1in" svg:height="0.25in" draw:id="id142" draw:style-name="a563" draw:name="Shape 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in" svg:y="1.7in" svg:width="1in" svg:height="0.25in" draw:id="id143" draw:style-name="a567" draw:name="Text 7">
          <svg:title/>
          <svg:desc/>
          <text:p text:style-name="a566" text:class-names="" text:cond-style-name=""><text:span text:style-name="a564" text:class-names="">GET</text:span><text:span text:style-name="a565" text:class-names=""/></text:p>
          <draw:enhanced-geometry xmlns:dr3d="urn:oasis:names:tc:opendocument:xmlns:dr3d:1.0" draw:type="non-primitive" svg:viewBox="0 0 21600 21600" draw:enhanced-path="M 0 0 L 21600 0 21600 21600 0 21600 Z N"/>
        </draw:custom-shape>
        <draw:custom-shape svg:x="0.58in" svg:y="2.04in" svg:width="4.1in" svg:height="0.5in" draw:id="id144" draw:style-name="a571" draw:name="Text 8">
          <svg:title/>
          <svg:desc/>
          <text:p text:style-name="a570" text:class-names="" text:cond-style-name=""><text:span text:style-name="a568" text:class-names="">Page d'accueil hero section</text:span><text:span text:style-name="a569" text:class-names=""/></text:p>
          <draw:enhanced-geometry xmlns:dr3d="urn:oasis:names:tc:opendocument:xmlns:dr3d:1.0" draw:type="non-primitive" svg:viewBox="0 0 21600 21600" draw:enhanced-path="M 0 0 L 21600 0 21600 21600 0 21600 Z N"/>
        </draw:custom-shape>
        <draw:custom-shape svg:x="5.15in" svg:y="1.6in" svg:width="4.5in" svg:height="1.1in" draw:id="id145" draw:style-name="a572" draw:name="Shape 9">
          <svg:title/>
          <svg:desc/>
          <draw:enhanced-geometry xmlns:dr3d="urn:oasis:names:tc:opendocument:xmlns:dr3d:1.0" draw:type="non-primitive" svg:viewBox="0 0 21600 21600" draw:enhanced-path="M 0 0 L 21600 0 21600 21600 0 21600 Z N"/>
        </draw:custom-shape>
        <draw:custom-shape svg:x="5.15in" svg:y="1.6in" svg:width="0.08in" svg:height="1.1in" draw:id="id146" draw:style-name="a573" draw:name="Shape 10">
          <svg:title/>
          <svg:desc/>
          <draw:enhanced-geometry xmlns:dr3d="urn:oasis:names:tc:opendocument:xmlns:dr3d:1.0" draw:type="non-primitive" svg:viewBox="0 0 21600 21600" draw:enhanced-path="M 0 0 L 21600 0 21600 21600 0 21600 Z N"/>
        </draw:custom-shape>
        <draw:custom-shape svg:x="5.33in" svg:y="1.66in" svg:width="2.2in" svg:height="0.3in" draw:id="id147" draw:style-name="a577" draw:name="Text 11">
          <svg:title/>
          <svg:desc/>
          <text:p text:style-name="a576" text:class-names="" text:cond-style-name=""><text:span text:style-name="a574" text:class-names="">/terrain</text:span><text:span text:style-name="a575" text:class-names=""/></text:p>
          <draw:enhanced-geometry xmlns:dr3d="urn:oasis:names:tc:opendocument:xmlns:dr3d:1.0" draw:type="non-primitive" svg:viewBox="0 0 21600 21600" draw:enhanced-path="M 0 0 L 21600 0 21600 21600 0 21600 Z N"/>
        </draw:custom-shape>
        <draw:custom-shape svg:x="7.65in" svg:y="1.7in" svg:width="1in" svg:height="0.25in" draw:id="id148" draw:style-name="a578" draw:name="Shape 1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65in" svg:y="1.7in" svg:width="1in" svg:height="0.25in" draw:id="id149" draw:style-name="a582" draw:name="Text 13">
          <svg:title/>
          <svg:desc/>
          <text:p text:style-name="a581" text:class-names="" text:cond-style-name=""><text:span text:style-name="a579" text:class-names="">GET</text:span><text:span text:style-name="a580" text:class-names=""/></text:p>
          <draw:enhanced-geometry xmlns:dr3d="urn:oasis:names:tc:opendocument:xmlns:dr3d:1.0" draw:type="non-primitive" svg:viewBox="0 0 21600 21600" draw:enhanced-path="M 0 0 L 21600 0 21600 21600 0 21600 Z N"/>
        </draw:custom-shape>
        <draw:custom-shape svg:x="5.33in" svg:y="2.04in" svg:width="4.1in" svg:height="0.5in" draw:id="id150" draw:style-name="a586" draw:name="Text 14">
          <svg:title/>
          <svg:desc/>
          <text:p text:style-name="a585" text:class-names="" text:cond-style-name=""><text:span text:style-name="a583" text:class-names="">Liste avec filtres multi-critères</text:span><text:span text:style-name="a584" text:class-names=""/></text:p>
          <draw:enhanced-geometry xmlns:dr3d="urn:oasis:names:tc:opendocument:xmlns:dr3d:1.0" draw:type="non-primitive" svg:viewBox="0 0 21600 21600" draw:enhanced-path="M 0 0 L 21600 0 21600 21600 0 21600 Z N"/>
        </draw:custom-shape>
        <draw:custom-shape svg:x="0.4in" svg:y="2.88in" svg:width="4.5in" svg:height="1.1in" draw:id="id151" draw:style-name="a587" draw:name="Shape 15">
          <svg:title/>
          <svg:desc/>
          <draw:enhanced-geometry xmlns:dr3d="urn:oasis:names:tc:opendocument:xmlns:dr3d:1.0" draw:type="non-primitive" svg:viewBox="0 0 21600 21600" draw:enhanced-path="M 0 0 L 21600 0 21600 21600 0 21600 Z N"/>
        </draw:custom-shape>
        <draw:custom-shape svg:x="0.4in" svg:y="2.88in" svg:width="0.08in" svg:height="1.1in" draw:id="id152" draw:style-name="a588" draw:name="Shape 16">
          <svg:title/>
          <svg:desc/>
          <draw:enhanced-geometry xmlns:dr3d="urn:oasis:names:tc:opendocument:xmlns:dr3d:1.0" draw:type="non-primitive" svg:viewBox="0 0 21600 21600" draw:enhanced-path="M 0 0 L 21600 0 21600 21600 0 21600 Z N"/>
        </draw:custom-shape>
        <draw:custom-shape svg:x="0.58in" svg:y="2.94in" svg:width="2.2in" svg:height="0.3in" draw:id="id153" draw:style-name="a592" draw:name="Text 17">
          <svg:title/>
          <svg:desc/>
          <text:p text:style-name="a591" text:class-names="" text:cond-style-name=""><text:span text:style-name="a589" text:class-names="">/terrain/&lt;pk&gt;/</text:span><text:span text:style-name="a590" text:class-names=""/></text:p>
          <draw:enhanced-geometry xmlns:dr3d="urn:oasis:names:tc:opendocument:xmlns:dr3d:1.0" draw:type="non-primitive" svg:viewBox="0 0 21600 21600" draw:enhanced-path="M 0 0 L 21600 0 21600 21600 0 21600 Z N"/>
        </draw:custom-shape>
        <draw:custom-shape svg:x="2.9in" svg:y="2.98in" svg:width="1in" svg:height="0.25in" draw:id="id154" draw:style-name="a593" draw:name="Shape 1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in" svg:y="2.98in" svg:width="1in" svg:height="0.25in" draw:id="id155" draw:style-name="a597" draw:name="Text 19">
          <svg:title/>
          <svg:desc/>
          <text:p text:style-name="a596" text:class-names="" text:cond-style-name=""><text:span text:style-name="a594" text:class-names="">GET</text:span><text:span text:style-name="a595" text:class-names=""/></text:p>
          <draw:enhanced-geometry xmlns:dr3d="urn:oasis:names:tc:opendocument:xmlns:dr3d:1.0" draw:type="non-primitive" svg:viewBox="0 0 21600 21600" draw:enhanced-path="M 0 0 L 21600 0 21600 21600 0 21600 Z N"/>
        </draw:custom-shape>
        <draw:custom-shape svg:x="0.58in" svg:y="3.32in" svg:width="4.1in" svg:height="0.5in" draw:id="id156" draw:style-name="a601" draw:name="Text 20">
          <svg:title/>
          <svg:desc/>
          <text:p text:style-name="a600" text:class-names="" text:cond-style-name=""><text:span text:style-name="a598" text:class-names="">Détail + tableau réservations</text:span><text:span text:style-name="a599" text:class-names=""/></text:p>
          <draw:enhanced-geometry xmlns:dr3d="urn:oasis:names:tc:opendocument:xmlns:dr3d:1.0" draw:type="non-primitive" svg:viewBox="0 0 21600 21600" draw:enhanced-path="M 0 0 L 21600 0 21600 21600 0 21600 Z N"/>
        </draw:custom-shape>
        <draw:custom-shape svg:x="5.15in" svg:y="2.88in" svg:width="4.5in" svg:height="1.1in" draw:id="id157" draw:style-name="a602" draw:name="Shape 21">
          <svg:title/>
          <svg:desc/>
          <draw:enhanced-geometry xmlns:dr3d="urn:oasis:names:tc:opendocument:xmlns:dr3d:1.0" draw:type="non-primitive" svg:viewBox="0 0 21600 21600" draw:enhanced-path="M 0 0 L 21600 0 21600 21600 0 21600 Z N"/>
        </draw:custom-shape>
        <draw:custom-shape svg:x="5.15in" svg:y="2.88in" svg:width="0.08in" svg:height="1.1in" draw:id="id158" draw:style-name="a603" draw:name="Shape 22">
          <svg:title/>
          <svg:desc/>
          <draw:enhanced-geometry xmlns:dr3d="urn:oasis:names:tc:opendocument:xmlns:dr3d:1.0" draw:type="non-primitive" svg:viewBox="0 0 21600 21600" draw:enhanced-path="M 0 0 L 21600 0 21600 21600 0 21600 Z N"/>
        </draw:custom-shape>
        <draw:custom-shape svg:x="5.33in" svg:y="2.94in" svg:width="2.2in" svg:height="0.3in" draw:id="id159" draw:style-name="a607" draw:name="Text 23">
          <svg:title/>
          <svg:desc/>
          <text:p text:style-name="a606" text:class-names="" text:cond-style-name=""><text:span text:style-name="a604" text:class-names="">/reserver/&lt;id&gt;/</text:span><text:span text:style-name="a605" text:class-names=""/></text:p>
          <draw:enhanced-geometry xmlns:dr3d="urn:oasis:names:tc:opendocument:xmlns:dr3d:1.0" draw:type="non-primitive" svg:viewBox="0 0 21600 21600" draw:enhanced-path="M 0 0 L 21600 0 21600 21600 0 21600 Z N"/>
        </draw:custom-shape>
        <draw:custom-shape svg:x="7.65in" svg:y="2.98in" svg:width="1in" svg:height="0.25in" draw:id="id160" draw:style-name="a608" draw:name="Shape 2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65in" svg:y="2.98in" svg:width="1in" svg:height="0.25in" draw:id="id161" draw:style-name="a612" draw:name="Text 25">
          <svg:title/>
          <svg:desc/>
          <text:p text:style-name="a611" text:class-names="" text:cond-style-name=""><text:span text:style-name="a609" text:class-names="">GET/POST</text:span><text:span text:style-name="a610" text:class-names=""/></text:p>
          <draw:enhanced-geometry xmlns:dr3d="urn:oasis:names:tc:opendocument:xmlns:dr3d:1.0" draw:type="non-primitive" svg:viewBox="0 0 21600 21600" draw:enhanced-path="M 0 0 L 21600 0 21600 21600 0 21600 Z N"/>
        </draw:custom-shape>
        <draw:custom-shape svg:x="5.33in" svg:y="3.32in" svg:width="4.1in" svg:height="0.5in" draw:id="id162" draw:style-name="a616" draw:name="Text 26">
          <svg:title/>
          <svg:desc/>
          <text:p text:style-name="a615" text:class-names="" text:cond-style-name=""><text:span text:style-name="a613" text:class-names="">Formulaire avec validation</text:span><text:span text:style-name="a614" text:class-names=""/></text:p>
          <draw:enhanced-geometry xmlns:dr3d="urn:oasis:names:tc:opendocument:xmlns:dr3d:1.0" draw:type="non-primitive" svg:viewBox="0 0 21600 21600" draw:enhanced-path="M 0 0 L 21600 0 21600 21600 0 21600 Z N"/>
        </draw:custom-shape>
        <draw:custom-shape svg:x="0.4in" svg:y="4.16in" svg:width="4.5in" svg:height="1.1in" draw:id="id163" draw:style-name="a617" draw:name="Shape 27">
          <svg:title/>
          <svg:desc/>
          <draw:enhanced-geometry xmlns:dr3d="urn:oasis:names:tc:opendocument:xmlns:dr3d:1.0" draw:type="non-primitive" svg:viewBox="0 0 21600 21600" draw:enhanced-path="M 0 0 L 21600 0 21600 21600 0 21600 Z N"/>
        </draw:custom-shape>
        <draw:custom-shape svg:x="0.4in" svg:y="4.16in" svg:width="0.08in" svg:height="1.1in" draw:id="id164" draw:style-name="a618" draw:name="Shape 28">
          <svg:title/>
          <svg:desc/>
          <draw:enhanced-geometry xmlns:dr3d="urn:oasis:names:tc:opendocument:xmlns:dr3d:1.0" draw:type="non-primitive" svg:viewBox="0 0 21600 21600" draw:enhanced-path="M 0 0 L 21600 0 21600 21600 0 21600 Z N"/>
        </draw:custom-shape>
        <draw:custom-shape svg:x="0.58in" svg:y="4.22in" svg:width="2.2in" svg:height="0.3in" draw:id="id165" draw:style-name="a622" draw:name="Text 29">
          <svg:title/>
          <svg:desc/>
          <text:p text:style-name="a621" text:class-names="" text:cond-style-name=""><text:span text:style-name="a619" text:class-names="">/calendrier/</text:span><text:span text:style-name="a620" text:class-names=""/></text:p>
          <draw:enhanced-geometry xmlns:dr3d="urn:oasis:names:tc:opendocument:xmlns:dr3d:1.0" draw:type="non-primitive" svg:viewBox="0 0 21600 21600" draw:enhanced-path="M 0 0 L 21600 0 21600 21600 0 21600 Z N"/>
        </draw:custom-shape>
        <draw:custom-shape svg:x="2.9in" svg:y="4.26in" svg:width="1in" svg:height="0.25in" draw:id="id166" draw:style-name="a623" draw:name="Shape 3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in" svg:y="4.26in" svg:width="1in" svg:height="0.25in" draw:id="id167" draw:style-name="a627" draw:name="Text 31">
          <svg:title/>
          <svg:desc/>
          <text:p text:style-name="a626" text:class-names="" text:cond-style-name=""><text:span text:style-name="a624" text:class-names="">GET</text:span><text:span text:style-name="a625" text:class-names=""/></text:p>
          <draw:enhanced-geometry xmlns:dr3d="urn:oasis:names:tc:opendocument:xmlns:dr3d:1.0" draw:type="non-primitive" svg:viewBox="0 0 21600 21600" draw:enhanced-path="M 0 0 L 21600 0 21600 21600 0 21600 Z N"/>
        </draw:custom-shape>
        <draw:custom-shape svg:x="0.58in" svg:y="4.6in" svg:width="4.1in" svg:height="0.5in" draw:id="id168" draw:style-name="a631" draw:name="Text 32">
          <svg:title/>
          <svg:desc/>
          <text:p text:style-name="a630" text:class-names="" text:cond-style-name=""><text:span text:style-name="a628" text:class-names="">Réservations à venir (≥ aujourd'hui)</text:span><text:span text:style-name="a629" text:class-names=""/></text:p>
          <draw:enhanced-geometry xmlns:dr3d="urn:oasis:names:tc:opendocument:xmlns:dr3d:1.0" draw:type="non-primitive" svg:viewBox="0 0 21600 21600" draw:enhanced-path="M 0 0 L 21600 0 21600 21600 0 21600 Z N"/>
        </draw:custom-shape>
        <draw:custom-shape svg:x="5.15in" svg:y="4.16in" svg:width="4.5in" svg:height="1.1in" draw:id="id169" draw:style-name="a632" draw:name="Shape 33">
          <svg:title/>
          <svg:desc/>
          <draw:enhanced-geometry xmlns:dr3d="urn:oasis:names:tc:opendocument:xmlns:dr3d:1.0" draw:type="non-primitive" svg:viewBox="0 0 21600 21600" draw:enhanced-path="M 0 0 L 21600 0 21600 21600 0 21600 Z N"/>
        </draw:custom-shape>
        <draw:custom-shape svg:x="5.15in" svg:y="4.16in" svg:width="0.08in" svg:height="1.1in" draw:id="id170" draw:style-name="a633" draw:name="Shape 34">
          <svg:title/>
          <svg:desc/>
          <draw:enhanced-geometry xmlns:dr3d="urn:oasis:names:tc:opendocument:xmlns:dr3d:1.0" draw:type="non-primitive" svg:viewBox="0 0 21600 21600" draw:enhanced-path="M 0 0 L 21600 0 21600 21600 0 21600 Z N"/>
        </draw:custom-shape>
        <draw:custom-shape svg:x="5.33in" svg:y="4.22in" svg:width="2.2in" svg:height="0.3in" draw:id="id171" draw:style-name="a637" draw:name="Text 35">
          <svg:title/>
          <svg:desc/>
          <text:p text:style-name="a636" text:class-names="" text:cond-style-name=""><text:span text:style-name="a634" text:class-names="">/joueurs/add/</text:span><text:span text:style-name="a635" text:class-names=""/></text:p>
          <draw:enhanced-geometry xmlns:dr3d="urn:oasis:names:tc:opendocument:xmlns:dr3d:1.0" draw:type="non-primitive" svg:viewBox="0 0 21600 21600" draw:enhanced-path="M 0 0 L 21600 0 21600 21600 0 21600 Z N"/>
        </draw:custom-shape>
        <draw:custom-shape svg:x="7.65in" svg:y="4.26in" svg:width="1in" svg:height="0.25in" draw:id="id172" draw:style-name="a638" draw:name="Shape 3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32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65in" svg:y="4.26in" svg:width="1in" svg:height="0.25in" draw:id="id173" draw:style-name="a642" draw:name="Text 37">
          <svg:title/>
          <svg:desc/>
          <text:p text:style-name="a641" text:class-names="" text:cond-style-name=""><text:span text:style-name="a639" text:class-names="">GET/POST</text:span><text:span text:style-name="a640" text:class-names=""/></text:p>
          <draw:enhanced-geometry xmlns:dr3d="urn:oasis:names:tc:opendocument:xmlns:dr3d:1.0" draw:type="non-primitive" svg:viewBox="0 0 21600 21600" draw:enhanced-path="M 0 0 L 21600 0 21600 21600 0 21600 Z N"/>
        </draw:custom-shape>
        <draw:custom-shape svg:x="5.33in" svg:y="4.6in" svg:width="4.1in" svg:height="0.5in" draw:id="id174" draw:style-name="a646" draw:name="Text 38">
          <svg:title/>
          <svg:desc/>
          <text:p text:style-name="a645" text:class-names="" text:cond-style-name=""><text:span text:style-name="a643" text:class-names="">Inscription d'un nouveau joueur</text:span><text:span text:style-name="a644" text:class-names=""/></text:p>
          <draw:enhanced-geometry xmlns:dr3d="urn:oasis:names:tc:opendocument:xmlns:dr3d:1.0" draw:type="non-primitive" svg:viewBox="0 0 21600 21600" draw:enhanced-path="M 0 0 L 21600 0 21600 21600 0 21600 Z N"/>
        </draw:custom-shape>
        <presentation:notes draw:style-name="a654">
          <draw:page-thumbnail draw:page-number="7" svg:x="-0.1875in" svg:y="1.25in" svg:width="6in" svg:height="3.375in" presentation:class="page" draw:id="id175" presentation:style-name="a647" draw:name="Slide Image Placeholder 1">
            <svg:title/>
            <svg:desc/>
          </draw:page-thumbnail>
          <draw:frame draw:id="id176" presentation:style-name="a650" draw:name="Notes Placeholder 2" svg:x="0.5625in" svg:y="4.8125in" svg:width="4.5in" svg:height="3.9375in" presentation:class="notes" presentation:placeholder="false">
            <draw:text-box>
              <text:p text:style-name="a649" text:class-names="" text:cond-style-name=""><text:span text:style-name="a648" text:class-names="">Les 6 vues couvrent l'intégralité du parcours utilisateur. De la recherche avec filtres jusqu'à la réservation validée, en passant par le calendrier d'occupation. Les vues reserver et joueur_add acceptent GET et POST pour la soumission de formulaires.</text:span></text:p>
            </draw:text-box>
            <svg:title/>
            <svg:desc/>
          </draw:frame>
          <draw:frame draw:id="id177" presentation:style-name="a653" draw:name="Slide Number Placeholder 3" svg:x="3.18576in" svg:y="9.49826in" svg:width="2.4375in" svg:height="0.50174in" presentation:class="page-number" presentation:placeholder="false">
            <draw:text-box>
              <text:p text:style-name="a652" text:class-names="" text:cond-style-name=""><text:span text:style-name="a651" text:class-names=""><text:page-number style:num-format="1" text:fixed="false">7</text:page-number></text:span></text:p>
            </draw:text-box>
            <svg:title/>
            <svg:desc/>
          </draw:frame>
        </presentation:notes>
      </draw:page>
      <draw:page draw:name="Slide 8" draw:style-name="a655" draw:master-page-name="Master1-Layout1-cust-DEFAULT" presentation:presentation-page-layout-name="Master1-PPL1" draw:id="Slide-263">
        <draw:custom-shape svg:x="0in" svg:y="0in" svg:width="10in" svg:height="0.08in" draw:id="id178" draw:style-name="a656"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179" draw:style-name="a660" draw:name="Text 1">
          <svg:title/>
          <svg:desc/>
          <text:p text:style-name="a659" text:class-names="" text:cond-style-name=""><text:span text:style-name="a657" text:class-names="">07 — INTERFACE UTILISATEUR</text:span><text:span text:style-name="a658" text:class-names=""/></text:p>
          <draw:enhanced-geometry xmlns:dr3d="urn:oasis:names:tc:opendocument:xmlns:dr3d:1.0" draw:type="non-primitive" svg:viewBox="0 0 21600 21600" draw:enhanced-path="M 0 0 L 21600 0 21600 21600 0 21600 Z N"/>
        </draw:custom-shape>
        <draw:custom-shape svg:x="0.5in" svg:y="0.65in" svg:width="9in" svg:height="0.6in" draw:id="id180" draw:style-name="a664" draw:name="Text 2">
          <svg:title/>
          <svg:desc/>
          <text:p text:style-name="a663" text:class-names="" text:cond-style-name=""><text:span text:style-name="a661" text:class-names="">Bootstrap 5 · Design Responsive</text:span><text:span text:style-name="a662" text:class-names=""/></text:p>
          <draw:enhanced-geometry xmlns:dr3d="urn:oasis:names:tc:opendocument:xmlns:dr3d:1.0" draw:type="non-primitive" svg:viewBox="0 0 21600 21600" draw:enhanced-path="M 0 0 L 21600 0 21600 21600 0 21600 Z N"/>
        </draw:custom-shape>
        <draw:custom-shape svg:x="0.35in" svg:y="1.55in" svg:width="3in" svg:height="1.7in" draw:id="id181" draw:style-name="a665" draw:name="Shape 3">
          <svg:title/>
          <svg:desc/>
          <draw:enhanced-geometry xmlns:dr3d="urn:oasis:names:tc:opendocument:xmlns:dr3d:1.0" draw:type="non-primitive" svg:viewBox="0 0 21600 21600" draw:enhanced-path="M 0 0 L 21600 0 21600 21600 0 21600 Z N"/>
        </draw:custom-shape>
        <draw:custom-shape svg:x="0.5in" svg:y="1.65in" svg:width="0.5in" svg:height="0.5in" draw:id="id182" draw:style-name="a668" draw:name="Text 4">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ustom-shape svg:x="1in" svg:y="1.65in" svg:width="2.2in" svg:height="0.35in" draw:id="id183" draw:style-name="a672" draw:name="Text 5">
          <svg:title/>
          <svg:desc/>
          <text:p text:style-name="a671" text:class-names="" text:cond-style-name=""><text:span text:style-name="a669" text:class-names="">base.html</text:span><text:span text:style-name="a670" text:class-names=""/></text:p>
          <draw:enhanced-geometry xmlns:dr3d="urn:oasis:names:tc:opendocument:xmlns:dr3d:1.0" draw:type="non-primitive" svg:viewBox="0 0 21600 21600" draw:enhanced-path="M 0 0 L 21600 0 21600 21600 0 21600 Z N"/>
        </draw:custom-shape>
        <draw:custom-shape svg:x="0.5in" svg:y="2.1in" svg:width="2.7in" svg:height="0.32in" draw:id="id184" draw:style-name="a676" draw:name="Text 6">
          <svg:title/>
          <svg:desc/>
          <text:p text:style-name="a675" text:class-names="" text:cond-style-name=""><text:span text:style-name="a673" text:class-names="">Navbar verte</text:span><text:span text:style-name="a674" text:class-names=""/></text:p>
          <draw:enhanced-geometry xmlns:dr3d="urn:oasis:names:tc:opendocument:xmlns:dr3d:1.0" draw:type="non-primitive" svg:viewBox="0 0 21600 21600" draw:enhanced-path="M 0 0 L 21600 0 21600 21600 0 21600 Z N"/>
        </draw:custom-shape>
        <draw:custom-shape svg:x="0.5in" svg:y="2.45in" svg:width="2.7in" svg:height="0.6in" draw:id="id185" draw:style-name="a680" draw:name="Text 7">
          <svg:title/>
          <svg:desc/>
          <text:p text:style-name="a679" text:class-names="" text:cond-style-name=""><text:span text:style-name="a677" text:class-names="">navbar-dark bg-success</text:span><text:span text:style-name="a678" text:class-names=""/></text:p>
          <draw:enhanced-geometry xmlns:dr3d="urn:oasis:names:tc:opendocument:xmlns:dr3d:1.0" draw:type="non-primitive" svg:viewBox="0 0 21600 21600" draw:enhanced-path="M 0 0 L 21600 0 21600 21600 0 21600 Z N"/>
        </draw:custom-shape>
        <draw:custom-shape svg:x="3.65in" svg:y="1.55in" svg:width="3in" svg:height="1.7in" draw:id="id186" draw:style-name="a681" draw:name="Shape 8">
          <svg:title/>
          <svg:desc/>
          <draw:enhanced-geometry xmlns:dr3d="urn:oasis:names:tc:opendocument:xmlns:dr3d:1.0" draw:type="non-primitive" svg:viewBox="0 0 21600 21600" draw:enhanced-path="M 0 0 L 21600 0 21600 21600 0 21600 Z N"/>
        </draw:custom-shape>
        <draw:custom-shape svg:x="3.8in" svg:y="1.65in" svg:width="0.5in" svg:height="0.5in" draw:id="id187" draw:style-name="a684" draw:name="Text 9">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custom-shape svg:x="4.3in" svg:y="1.65in" svg:width="2.2in" svg:height="0.35in" draw:id="id188" draw:style-name="a688" draw:name="Text 10">
          <svg:title/>
          <svg:desc/>
          <text:p text:style-name="a687" text:class-names="" text:cond-style-name=""><text:span text:style-name="a685" text:class-names="">home.html</text:span><text:span text:style-name="a686" text:class-names=""/></text:p>
          <draw:enhanced-geometry xmlns:dr3d="urn:oasis:names:tc:opendocument:xmlns:dr3d:1.0" draw:type="non-primitive" svg:viewBox="0 0 21600 21600" draw:enhanced-path="M 0 0 L 21600 0 21600 21600 0 21600 Z N"/>
        </draw:custom-shape>
        <draw:custom-shape svg:x="3.8in" svg:y="2.1in" svg:width="2.7in" svg:height="0.32in" draw:id="id189" draw:style-name="a692" draw:name="Text 11">
          <svg:title/>
          <svg:desc/>
          <text:p text:style-name="a691" text:class-names="" text:cond-style-name=""><text:span text:style-name="a689" text:class-names="">Hero + features grid</text:span><text:span text:style-name="a690" text:class-names=""/></text:p>
          <draw:enhanced-geometry xmlns:dr3d="urn:oasis:names:tc:opendocument:xmlns:dr3d:1.0" draw:type="non-primitive" svg:viewBox="0 0 21600 21600" draw:enhanced-path="M 0 0 L 21600 0 21600 21600 0 21600 Z N"/>
        </draw:custom-shape>
        <draw:custom-shape svg:x="3.8in" svg:y="2.45in" svg:width="2.7in" svg:height="0.6in" draw:id="id190" draw:style-name="a696" draw:name="Text 12">
          <svg:title/>
          <svg:desc/>
          <text:p text:style-name="a695" text:class-names="" text:cond-style-name=""><text:span text:style-name="a693" text:class-names="">container · row · col-md-4</text:span><text:span text:style-name="a694" text:class-names=""/></text:p>
          <draw:enhanced-geometry xmlns:dr3d="urn:oasis:names:tc:opendocument:xmlns:dr3d:1.0" draw:type="non-primitive" svg:viewBox="0 0 21600 21600" draw:enhanced-path="M 0 0 L 21600 0 21600 21600 0 21600 Z N"/>
        </draw:custom-shape>
        <draw:custom-shape svg:x="6.95in" svg:y="1.55in" svg:width="3in" svg:height="1.7in" draw:id="id191" draw:style-name="a697" draw:name="Shape 13">
          <svg:title/>
          <svg:desc/>
          <draw:enhanced-geometry xmlns:dr3d="urn:oasis:names:tc:opendocument:xmlns:dr3d:1.0" draw:type="non-primitive" svg:viewBox="0 0 21600 21600" draw:enhanced-path="M 0 0 L 21600 0 21600 21600 0 21600 Z N"/>
        </draw:custom-shape>
        <draw:custom-shape svg:x="7.1in" svg:y="1.65in" svg:width="0.5in" svg:height="0.5in" draw:id="id192" draw:style-name="a700" draw:name="Text 14">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custom-shape svg:x="7.6in" svg:y="1.65in" svg:width="2.2in" svg:height="0.35in" draw:id="id193" draw:style-name="a704" draw:name="Text 15">
          <svg:title/>
          <svg:desc/>
          <text:p text:style-name="a703" text:class-names="" text:cond-style-name=""><text:span text:style-name="a701" text:class-names="">terrain_list.html</text:span><text:span text:style-name="a702" text:class-names=""/></text:p>
          <draw:enhanced-geometry xmlns:dr3d="urn:oasis:names:tc:opendocument:xmlns:dr3d:1.0" draw:type="non-primitive" svg:viewBox="0 0 21600 21600" draw:enhanced-path="M 0 0 L 21600 0 21600 21600 0 21600 Z N"/>
        </draw:custom-shape>
        <draw:custom-shape svg:x="7.1in" svg:y="2.1in" svg:width="2.7in" svg:height="0.32in" draw:id="id194" draw:style-name="a708" draw:name="Text 16">
          <svg:title/>
          <svg:desc/>
          <text:p text:style-name="a707" text:class-names="" text:cond-style-name=""><text:span text:style-name="a705" text:class-names="">Filtres + cartes</text:span><text:span text:style-name="a706" text:class-names=""/></text:p>
          <draw:enhanced-geometry xmlns:dr3d="urn:oasis:names:tc:opendocument:xmlns:dr3d:1.0" draw:type="non-primitive" svg:viewBox="0 0 21600 21600" draw:enhanced-path="M 0 0 L 21600 0 21600 21600 0 21600 Z N"/>
        </draw:custom-shape>
        <draw:custom-shape svg:x="7.1in" svg:y="2.45in" svg:width="2.7in" svg:height="0.6in" draw:id="id195" draw:style-name="a712" draw:name="Text 17">
          <svg:title/>
          <svg:desc/>
          <text:p text:style-name="a711" text:class-names="" text:cond-style-name=""><text:span text:style-name="a709" text:class-names="">form-control · card</text:span><text:span text:style-name="a710" text:class-names=""/></text:p>
          <draw:enhanced-geometry xmlns:dr3d="urn:oasis:names:tc:opendocument:xmlns:dr3d:1.0" draw:type="non-primitive" svg:viewBox="0 0 21600 21600" draw:enhanced-path="M 0 0 L 21600 0 21600 21600 0 21600 Z N"/>
        </draw:custom-shape>
        <draw:custom-shape svg:x="0.35in" svg:y="3.5in" svg:width="3in" svg:height="1.7in" draw:id="id196" draw:style-name="a713" draw:name="Shape 18">
          <svg:title/>
          <svg:desc/>
          <draw:enhanced-geometry xmlns:dr3d="urn:oasis:names:tc:opendocument:xmlns:dr3d:1.0" draw:type="non-primitive" svg:viewBox="0 0 21600 21600" draw:enhanced-path="M 0 0 L 21600 0 21600 21600 0 21600 Z N"/>
        </draw:custom-shape>
        <draw:custom-shape svg:x="0.5in" svg:y="3.6in" svg:width="0.5in" svg:height="0.5in" draw:id="id197" draw:style-name="a716" draw:name="Text 19">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custom-shape svg:x="1in" svg:y="3.6in" svg:width="2.2in" svg:height="0.35in" draw:id="id198" draw:style-name="a720" draw:name="Text 20">
          <svg:title/>
          <svg:desc/>
          <text:p text:style-name="a719" text:class-names="" text:cond-style-name=""><text:span text:style-name="a717" text:class-names="">terrain_detail.html</text:span><text:span text:style-name="a718" text:class-names=""/></text:p>
          <draw:enhanced-geometry xmlns:dr3d="urn:oasis:names:tc:opendocument:xmlns:dr3d:1.0" draw:type="non-primitive" svg:viewBox="0 0 21600 21600" draw:enhanced-path="M 0 0 L 21600 0 21600 21600 0 21600 Z N"/>
        </draw:custom-shape>
        <draw:custom-shape svg:x="0.5in" svg:y="4.05in" svg:width="2.7in" svg:height="0.32in" draw:id="id199" draw:style-name="a724" draw:name="Text 21">
          <svg:title/>
          <svg:desc/>
          <text:p text:style-name="a723" text:class-names="" text:cond-style-name=""><text:span text:style-name="a721" text:class-names="">Infos + réservations</text:span><text:span text:style-name="a722" text:class-names=""/></text:p>
          <draw:enhanced-geometry xmlns:dr3d="urn:oasis:names:tc:opendocument:xmlns:dr3d:1.0" draw:type="non-primitive" svg:viewBox="0 0 21600 21600" draw:enhanced-path="M 0 0 L 21600 0 21600 21600 0 21600 Z N"/>
        </draw:custom-shape>
        <draw:custom-shape svg:x="0.5in" svg:y="4.4in" svg:width="2.7in" svg:height="0.6in" draw:id="id200" draw:style-name="a728" draw:name="Text 22">
          <svg:title/>
          <svg:desc/>
          <text:p text:style-name="a727" text:class-names="" text:cond-style-name=""><text:span text:style-name="a725" text:class-names="">table · badge</text:span><text:span text:style-name="a726" text:class-names=""/></text:p>
          <draw:enhanced-geometry xmlns:dr3d="urn:oasis:names:tc:opendocument:xmlns:dr3d:1.0" draw:type="non-primitive" svg:viewBox="0 0 21600 21600" draw:enhanced-path="M 0 0 L 21600 0 21600 21600 0 21600 Z N"/>
        </draw:custom-shape>
        <draw:custom-shape svg:x="3.65in" svg:y="3.5in" svg:width="3in" svg:height="1.7in" draw:id="id201" draw:style-name="a729" draw:name="Shape 23">
          <svg:title/>
          <svg:desc/>
          <draw:enhanced-geometry xmlns:dr3d="urn:oasis:names:tc:opendocument:xmlns:dr3d:1.0" draw:type="non-primitive" svg:viewBox="0 0 21600 21600" draw:enhanced-path="M 0 0 L 21600 0 21600 21600 0 21600 Z N"/>
        </draw:custom-shape>
        <draw:custom-shape svg:x="3.8in" svg:y="3.6in" svg:width="0.5in" svg:height="0.5in" draw:id="id202" draw:style-name="a732" draw:name="Text 24">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x="4.3in" svg:y="3.6in" svg:width="2.2in" svg:height="0.35in" draw:id="id203" draw:style-name="a736" draw:name="Text 25">
          <svg:title/>
          <svg:desc/>
          <text:p text:style-name="a735" text:class-names="" text:cond-style-name=""><text:span text:style-name="a733" text:class-names="">reserver.html</text:span><text:span text:style-name="a734" text:class-names=""/></text:p>
          <draw:enhanced-geometry xmlns:dr3d="urn:oasis:names:tc:opendocument:xmlns:dr3d:1.0" draw:type="non-primitive" svg:viewBox="0 0 21600 21600" draw:enhanced-path="M 0 0 L 21600 0 21600 21600 0 21600 Z N"/>
        </draw:custom-shape>
        <draw:custom-shape svg:x="3.8in" svg:y="4.05in" svg:width="2.7in" svg:height="0.32in" draw:id="id204" draw:style-name="a740" draw:name="Text 26">
          <svg:title/>
          <svg:desc/>
          <text:p text:style-name="a739" text:class-names="" text:cond-style-name=""><text:span text:style-name="a737" text:class-names="">Formulaire réservation</text:span><text:span text:style-name="a738" text:class-names=""/></text:p>
          <draw:enhanced-geometry xmlns:dr3d="urn:oasis:names:tc:opendocument:xmlns:dr3d:1.0" draw:type="non-primitive" svg:viewBox="0 0 21600 21600" draw:enhanced-path="M 0 0 L 21600 0 21600 21600 0 21600 Z N"/>
        </draw:custom-shape>
        <draw:custom-shape svg:x="3.8in" svg:y="4.4in" svg:width="2.7in" svg:height="0.6in" draw:id="id205" draw:style-name="a744" draw:name="Text 27">
          <svg:title/>
          <svg:desc/>
          <text:p text:style-name="a743" text:class-names="" text:cond-style-name=""><text:span text:style-name="a741" text:class-names="">DateInput · TimeInput</text:span><text:span text:style-name="a742" text:class-names=""/></text:p>
          <draw:enhanced-geometry xmlns:dr3d="urn:oasis:names:tc:opendocument:xmlns:dr3d:1.0" draw:type="non-primitive" svg:viewBox="0 0 21600 21600" draw:enhanced-path="M 0 0 L 21600 0 21600 21600 0 21600 Z N"/>
        </draw:custom-shape>
        <draw:custom-shape svg:x="6.95in" svg:y="3.5in" svg:width="3in" svg:height="1.7in" draw:id="id206" draw:style-name="a745" draw:name="Shape 28">
          <svg:title/>
          <svg:desc/>
          <draw:enhanced-geometry xmlns:dr3d="urn:oasis:names:tc:opendocument:xmlns:dr3d:1.0" draw:type="non-primitive" svg:viewBox="0 0 21600 21600" draw:enhanced-path="M 0 0 L 21600 0 21600 21600 0 21600 Z N"/>
        </draw:custom-shape>
        <draw:custom-shape svg:x="7.1in" svg:y="3.6in" svg:width="0.5in" svg:height="0.5in" draw:id="id207" draw:style-name="a748" draw:name="Text 29">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custom-shape svg:x="7.6in" svg:y="3.6in" svg:width="2.2in" svg:height="0.35in" draw:id="id208" draw:style-name="a752" draw:name="Text 30">
          <svg:title/>
          <svg:desc/>
          <text:p text:style-name="a751" text:class-names="" text:cond-style-name=""><text:span text:style-name="a749" text:class-names="">calendrier.html</text:span><text:span text:style-name="a750" text:class-names=""/></text:p>
          <draw:enhanced-geometry xmlns:dr3d="urn:oasis:names:tc:opendocument:xmlns:dr3d:1.0" draw:type="non-primitive" svg:viewBox="0 0 21600 21600" draw:enhanced-path="M 0 0 L 21600 0 21600 21600 0 21600 Z N"/>
        </draw:custom-shape>
        <draw:custom-shape svg:x="7.1in" svg:y="4.05in" svg:width="2.7in" svg:height="0.32in" draw:id="id209" draw:style-name="a756" draw:name="Text 31">
          <svg:title/>
          <svg:desc/>
          <text:p text:style-name="a755" text:class-names="" text:cond-style-name=""><text:span text:style-name="a753" text:class-names="">Vue chronologique</text:span><text:span text:style-name="a754" text:class-names=""/></text:p>
          <draw:enhanced-geometry xmlns:dr3d="urn:oasis:names:tc:opendocument:xmlns:dr3d:1.0" draw:type="non-primitive" svg:viewBox="0 0 21600 21600" draw:enhanced-path="M 0 0 L 21600 0 21600 21600 0 21600 Z N"/>
        </draw:custom-shape>
        <draw:custom-shape svg:x="7.1in" svg:y="4.4in" svg:width="2.7in" svg:height="0.6in" draw:id="id210" draw:style-name="a760" draw:name="Text 32">
          <svg:title/>
          <svg:desc/>
          <text:p text:style-name="a759" text:class-names="" text:cond-style-name=""><text:span text:style-name="a757" text:class-names="">table-striped · order_by</text:span><text:span text:style-name="a758" text:class-names=""/></text:p>
          <draw:enhanced-geometry xmlns:dr3d="urn:oasis:names:tc:opendocument:xmlns:dr3d:1.0" draw:type="non-primitive" svg:viewBox="0 0 21600 21600" draw:enhanced-path="M 0 0 L 21600 0 21600 21600 0 21600 Z N"/>
        </draw:custom-shape>
        <presentation:notes draw:style-name="a768">
          <draw:page-thumbnail draw:page-number="8" svg:x="-0.1875in" svg:y="1.25in" svg:width="6in" svg:height="3.375in" presentation:class="page" draw:id="id211" presentation:style-name="a761" draw:name="Slide Image Placeholder 1">
            <svg:title/>
            <svg:desc/>
          </draw:page-thumbnail>
          <draw:frame draw:id="id212" presentation:style-name="a764" draw:name="Notes Placeholder 2" svg:x="0.5625in" svg:y="4.8125in" svg:width="4.5in" svg:height="3.9375in" presentation:class="notes" presentation:placeholder="false">
            <draw:text-box>
              <text:p text:style-name="a763" text:class-names="" text:cond-style-name=""><text:span text:style-name="a762" text:class-names="">L'interface est construite sur Bootstrap 5.3.3 avec Bootstrap Icons 1.11.3. Un template base.html fournit la navbar verte et les messages flash pour toutes les pages. Chaque template est pensé pour une tâche précise et le design reste cohérent sur tous les écrans.</text:span></text:p>
            </draw:text-box>
            <svg:title/>
            <svg:desc/>
          </draw:frame>
          <draw:frame draw:id="id213" presentation:style-name="a767" draw:name="Slide Number Placeholder 3" svg:x="3.18576in" svg:y="9.49826in" svg:width="2.4375in" svg:height="0.50174in" presentation:class="page-number" presentation:placeholder="false">
            <draw:text-box>
              <text:p text:style-name="a766" text:class-names="" text:cond-style-name=""><text:span text:style-name="a765" text:class-names=""><text:page-number style:num-format="1" text:fixed="false">8</text:page-number></text:span></text:p>
            </draw:text-box>
            <svg:title/>
            <svg:desc/>
          </draw:frame>
        </presentation:notes>
      </draw:page>
      <draw:page draw:name="Slide 9" draw:style-name="a769" draw:master-page-name="Master1-Layout1-cust-DEFAULT" presentation:presentation-page-layout-name="Master1-PPL1" draw:id="Slide-264">
        <draw:custom-shape svg:x="0in" svg:y="0in" svg:width="10in" svg:height="0.08in" draw:id="id214" draw:style-name="a770"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215" draw:style-name="a774" draw:name="Text 1">
          <svg:title/>
          <svg:desc/>
          <text:p text:style-name="a773" text:class-names="" text:cond-style-name=""><text:span text:style-name="a771" text:class-names="">08 — ADMINISTRATION DJANGO</text:span><text:span text:style-name="a772" text:class-names=""/></text:p>
          <draw:enhanced-geometry xmlns:dr3d="urn:oasis:names:tc:opendocument:xmlns:dr3d:1.0" draw:type="non-primitive" svg:viewBox="0 0 21600 21600" draw:enhanced-path="M 0 0 L 21600 0 21600 21600 0 21600 Z N"/>
        </draw:custom-shape>
        <draw:custom-shape svg:x="0.5in" svg:y="0.65in" svg:width="7in" svg:height="0.6in" draw:id="id216" draw:style-name="a778" draw:name="Text 2">
          <svg:title/>
          <svg:desc/>
          <text:p text:style-name="a777" text:class-names="" text:cond-style-name=""><text:span text:style-name="a775" text:class-names="">Interface /admin Personnalisée</text:span><text:span text:style-name="a776" text:class-names=""/></text:p>
          <draw:enhanced-geometry xmlns:dr3d="urn:oasis:names:tc:opendocument:xmlns:dr3d:1.0" draw:type="non-primitive" svg:viewBox="0 0 21600 21600" draw:enhanced-path="M 0 0 L 21600 0 21600 21600 0 21600 Z N"/>
        </draw:custom-shape>
        <draw:custom-shape svg:x="0.55in" svg:y="1.5in" svg:width="9in" svg:height="0.65in" draw:id="id217" draw:style-name="a781" draw:name="Text 4">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18" draw:name="Table 0" svg:x="0.4in" svg:y="1.925in" svg:width="9.2in" svg:height="2.8in">
          <table:table table:style-name="a782" table:template-name="{00000000-0000-0000-0000-000000000000}" table:use-banding-columns-styles="false" table:use-banding-rows-styles="false" table:use-first-column-styles="false" table:use-first-row-styles="false" table:use-last-column-styles="false" table:use-last-row-styles="false">
            <table:table-column table:style-name="a783" table:default-cell-style-name=""/>
            <table:table-column table:style-name="a784" table:default-cell-style-name=""/>
            <table:table-column table:style-name="a785" table:default-cell-style-name=""/>
            <table:table-column table:style-name="a786" table:default-cell-style-name=""/>
            <table:table-row table:style-name="a787" table:default-cell-style-name="">
              <table:table-cell table:style-name="a791">
                <text:p text:style-name="a790" text:class-names="" text:cond-style-name=""><text:span text:style-name="a788" text:class-names="">Modèle Admin</text:span><text:span text:style-name="a789" text:class-names=""/></text:p>
              </table:table-cell>
              <table:table-cell table:style-name="a795">
                <text:p text:style-name="a794" text:class-names="" text:cond-style-name=""><text:span text:style-name="a792" text:class-names="">list_display</text:span><text:span text:style-name="a793" text:class-names=""/></text:p>
              </table:table-cell>
              <table:table-cell table:style-name="a799">
                <text:p text:style-name="a798" text:class-names="" text:cond-style-name=""><text:span text:style-name="a796" text:class-names="">Filtres</text:span><text:span text:style-name="a797" text:class-names=""/></text:p>
              </table:table-cell>
              <table:table-cell table:style-name="a803">
                <text:p text:style-name="a802" text:class-names="" text:cond-style-name=""><text:span text:style-name="a800" text:class-names="">Édition directe</text:span><text:span text:style-name="a801" text:class-names=""/></text:p>
              </table:table-cell>
            </table:table-row>
            <table:table-row table:style-name="a804" table:default-cell-style-name="">
              <table:table-cell table:style-name="a808">
                <text:p text:style-name="a807" text:class-names="" text:cond-style-name=""><text:span text:style-name="a805" text:class-names="">ReservationAdmin</text:span><text:span text:style-name="a806" text:class-names=""/></text:p>
              </table:table-cell>
              <table:table-cell table:style-name="a812">
                <text:p text:style-name="a811" text:class-names="" text:cond-style-name=""><text:span text:style-name="a809" text:class-names="">terrain · date · heure · joueur</text:span><text:span text:style-name="a810" text:class-names=""/></text:p>
              </table:table-cell>
              <table:table-cell table:style-name="a816">
                <text:p text:style-name="a815" text:class-names="" text:cond-style-name=""><text:span text:style-name="a813" text:class-names="">date · terrain</text:span><text:span text:style-name="a814" text:class-names=""/></text:p>
              </table:table-cell>
              <table:table-cell table:style-name="a820">
                <text:p text:style-name="a819" text:class-names="" text:cond-style-name=""><text:span text:style-name="a817" text:class-names="">—</text:span><text:span text:style-name="a818" text:class-names=""/></text:p>
              </table:table-cell>
            </table:table-row>
            <table:table-row table:style-name="a821" table:default-cell-style-name="">
              <table:table-cell table:style-name="a825">
                <text:p text:style-name="a824" text:class-names="" text:cond-style-name=""><text:span text:style-name="a822" text:class-names="">TerrainAdmin</text:span><text:span text:style-name="a823" text:class-names=""/></text:p>
              </table:table-cell>
              <table:table-cell table:style-name="a829">
                <text:p text:style-name="a828" text:class-names="" text:cond-style-name=""><text:span text:style-name="a826" text:class-names="">nom · surface · sport · dispo</text:span><text:span text:style-name="a827" text:class-names=""/></text:p>
              </table:table-cell>
              <table:table-cell table:style-name="a833">
                <text:p text:style-name="a832" text:class-names="" text:cond-style-name=""><text:span text:style-name="a830" text:class-names="">sport · dispo · surface</text:span><text:span text:style-name="a831" text:class-names=""/></text:p>
              </table:table-cell>
              <table:table-cell table:style-name="a837">
                <text:p text:style-name="a836" text:class-names="" text:cond-style-name=""><text:span text:style-name="a834" text:class-names=""><text:s text:c="1"/>disponibilite</text:span><text:span text:style-name="a835" text:class-names=""/></text:p>
              </table:table-cell>
            </table:table-row>
            <table:table-row table:style-name="a838" table:default-cell-style-name="">
              <table:table-cell table:style-name="a842">
                <text:p text:style-name="a841" text:class-names="" text:cond-style-name=""><text:span text:style-name="a839" text:class-names="">SportAdmin</text:span><text:span text:style-name="a840" text:class-names=""/></text:p>
              </table:table-cell>
              <table:table-cell table:style-name="a846">
                <text:p text:style-name="a845" text:class-names="" text:cond-style-name=""><text:span text:style-name="a843" text:class-names="">nom_sport · capacite_max</text:span><text:span text:style-name="a844" text:class-names=""/></text:p>
              </table:table-cell>
              <table:table-cell table:style-name="a850">
                <text:p text:style-name="a849" text:class-names="" text:cond-style-name=""><text:span text:style-name="a847" text:class-names="">—</text:span><text:span text:style-name="a848" text:class-names=""/></text:p>
              </table:table-cell>
              <table:table-cell table:style-name="a854">
                <text:p text:style-name="a853" text:class-names="" text:cond-style-name=""><text:span text:style-name="a851" text:class-names="">—</text:span><text:span text:style-name="a852" text:class-names=""/></text:p>
              </table:table-cell>
            </table:table-row>
            <table:table-row table:style-name="a855" table:default-cell-style-name="">
              <table:table-cell table:style-name="a859">
                <text:p text:style-name="a858" text:class-names="" text:cond-style-name=""><text:span text:style-name="a856" text:class-names="">JoueurAdmin</text:span><text:span text:style-name="a857" text:class-names=""/></text:p>
              </table:table-cell>
              <table:table-cell table:style-name="a863">
                <text:p text:style-name="a862" text:class-names="" text:cond-style-name=""><text:span text:style-name="a860" text:class-names="">nom · telephone</text:span><text:span text:style-name="a861" text:class-names=""/></text:p>
              </table:table-cell>
              <table:table-cell table:style-name="a867">
                <text:p text:style-name="a866" text:class-names="" text:cond-style-name=""><text:span text:style-name="a864" text:class-names="">—</text:span><text:span text:style-name="a865" text:class-names=""/></text:p>
              </table:table-cell>
              <table:table-cell table:style-name="a871">
                <text:p text:style-name="a870" text:class-names="" text:cond-style-name=""><text:span text:style-name="a868" text:class-names="">—</text:span><text:span text:style-name="a869" text:class-names=""/></text:p>
              </table:table-cell>
            </table:table-row>
          </table:table>
          <draw:image xlink:href="media/image3.png" xlink:type="simple" xlink:show="embed" xlink:actuate="onLoad"/>
          <svg:title/>
          <svg:desc/>
        </draw:frame>
        <presentation:notes draw:style-name="a879">
          <draw:page-thumbnail draw:page-number="9" svg:x="-0.1875in" svg:y="1.25in" svg:width="6in" svg:height="3.375in" presentation:class="page" draw:id="id219" presentation:style-name="a872" draw:name="Slide Image Placeholder 1">
            <svg:title/>
            <svg:desc/>
          </draw:page-thumbnail>
          <draw:frame draw:id="id220" presentation:style-name="a875" draw:name="Notes Placeholder 2" svg:x="0.5625in" svg:y="4.8125in" svg:width="4.5in" svg:height="3.9375in" presentation:class="notes" presentation:placeholder="false">
            <draw:text-box>
              <text:p text:style-name="a874" text:class-names="" text:cond-style-name=""><text:span text:style-name="a873" text:class-names="">L'interface /admin de Django a été entièrement personnalisée. Chaque modèle expose des filtres pertinents et des colonnes utiles. La star de cet écran c'est la fonctionnalité list_editable qui permet de changer la disponibilité d'un terrain d'un simple clic depuis la liste.</text:span></text:p>
            </draw:text-box>
            <svg:title/>
            <svg:desc/>
          </draw:frame>
          <draw:frame draw:id="id221" presentation:style-name="a878" draw:name="Slide Number Placeholder 3" svg:x="3.18576in" svg:y="9.49826in" svg:width="2.4375in" svg:height="0.50174in" presentation:class="page-number" presentation:placeholder="false">
            <draw:text-box>
              <text:p text:style-name="a877" text:class-names="" text:cond-style-name=""><text:span text:style-name="a876" text:class-names=""><text:page-number style:num-format="1" text:fixed="false">9</text:page-number></text:span></text:p>
            </draw:text-box>
            <svg:title/>
            <svg:desc/>
          </draw:frame>
        </presentation:notes>
      </draw:page>
      <draw:page draw:name="Slide 10" draw:style-name="a880" draw:master-page-name="Master1-Layout1-cust-DEFAULT" presentation:presentation-page-layout-name="Master1-PPL1" draw:id="Slide-265">
        <draw:custom-shape svg:x="0in" svg:y="0in" svg:width="10in" svg:height="0.08in" draw:id="id222" draw:style-name="a881"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223" draw:style-name="a885" draw:name="Text 1">
          <svg:title/>
          <svg:desc/>
          <text:p text:style-name="a884" text:class-names="" text:cond-style-name=""><text:span text:style-name="a882" text:class-names="">09 — DIAGRAMMES UML</text:span><text:span text:style-name="a883" text:class-names=""/></text:p>
          <draw:enhanced-geometry xmlns:dr3d="urn:oasis:names:tc:opendocument:xmlns:dr3d:1.0" draw:type="non-primitive" svg:viewBox="0 0 21600 21600" draw:enhanced-path="M 0 0 L 21600 0 21600 21600 0 21600 Z N"/>
        </draw:custom-shape>
        <draw:custom-shape svg:x="0.5in" svg:y="0.65in" svg:width="9in" svg:height="0.6in" draw:id="id224" draw:style-name="a889" draw:name="Text 2">
          <svg:title/>
          <svg:desc/>
          <text:p text:style-name="a888" text:class-names="" text:cond-style-name=""><text:span text:style-name="a886" text:class-names="">Acteurs · Cas d'Usage · Classes</text:span><text:span text:style-name="a887" text:class-names=""/></text:p>
          <draw:enhanced-geometry xmlns:dr3d="urn:oasis:names:tc:opendocument:xmlns:dr3d:1.0" draw:type="non-primitive" svg:viewBox="0 0 21600 21600" draw:enhanced-path="M 0 0 L 21600 0 21600 21600 0 21600 Z N"/>
        </draw:custom-shape>
        <draw:custom-shape svg:x="0.4in" svg:y="1.55in" svg:width="4.4in" svg:height="3.7in" draw:id="id225" draw:style-name="a890" draw:name="Shape 3">
          <svg:title/>
          <svg:desc/>
          <draw:enhanced-geometry xmlns:dr3d="urn:oasis:names:tc:opendocument:xmlns:dr3d:1.0" draw:type="non-primitive" svg:viewBox="0 0 21600 21600" draw:enhanced-path="M 0 0 L 21600 0 21600 21600 0 21600 Z N"/>
        </draw:custom-shape>
        <draw:custom-shape svg:x="0.4in" svg:y="1.25455in" svg:width="4.4in" svg:height="0.45in" draw:id="id226" draw:style-name="a891" draw:name="Shape 4">
          <svg:title/>
          <svg:desc/>
          <draw:enhanced-geometry xmlns:dr3d="urn:oasis:names:tc:opendocument:xmlns:dr3d:1.0" draw:type="non-primitive" svg:viewBox="0 0 21600 21600" draw:enhanced-path="M 0 0 L 21600 0 21600 21600 0 21600 Z N"/>
        </draw:custom-shape>
        <draw:custom-shape svg:x="0.4in" svg:y="1.25455in" svg:width="4.4in" svg:height="0.45in" draw:id="id227" draw:style-name="a896" draw:name="Text 5">
          <svg:title/>
          <svg:desc/>
          <text:p text:style-name="a895" text:class-names="" text:cond-style-name=""><text:span text:style-name="a892" text:class-names="">Cas<text:s text:c="1"/></text:span><text:span text:style-name="a893" text:class-names="">d'Usage</text:span><text:span text:style-name="a894" text:class-names=""/></text:p>
          <draw:enhanced-geometry xmlns:dr3d="urn:oasis:names:tc:opendocument:xmlns:dr3d:1.0" draw:type="non-primitive" svg:viewBox="0 0 21600 21600" draw:enhanced-path="M 0 0 L 21600 0 21600 21600 0 21600 Z N"/>
        </draw:custom-shape>
        <draw:custom-shape svg:x="0.6in" svg:y="2.1in" svg:width="4in" svg:height="0.32in" draw:id="id228" draw:style-name="a899" draw:name="Text 6">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0.7in" svg:y="2.45in" svg:width="3.8in" svg:height="1.1in" draw:id="id229" draw:style-name="a902" draw:name="Text 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0.6in" svg:y="3.72in" svg:width="4in" svg:height="0.32in" draw:id="id230" draw:style-name="a905" draw:name="Text 9">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0.7in" svg:y="4.08in" svg:width="3.8in" svg:height="1in" draw:id="id231" draw:style-name="a908" draw:name="Text 10">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custom-shape svg:x="5.63103in" svg:y="1.55in" svg:width="3.52716in" svg:height="3.70539in" draw:id="id232" draw:style-name="a909" draw:name="Shape 11">
          <svg:title/>
          <svg:desc/>
          <draw:enhanced-geometry xmlns:dr3d="urn:oasis:names:tc:opendocument:xmlns:dr3d:1.0" draw:type="non-primitive" svg:viewBox="0 0 21600 21600" draw:enhanced-path="M 0 0 L 21600 0 21600 21600 0 21600 Z N"/>
        </draw:custom-shape>
        <draw:custom-shape svg:x="5.63642in" svg:y="1.24289in" svg:width="3.52177in" svg:height="0.45539in" draw:id="id233" draw:style-name="a910" draw:name="Shape 12">
          <svg:title/>
          <svg:desc/>
          <draw:enhanced-geometry xmlns:dr3d="urn:oasis:names:tc:opendocument:xmlns:dr3d:1.0" draw:type="non-primitive" svg:viewBox="0 0 21600 21600" draw:enhanced-path="M 0 0 L 21600 0 21600 21600 0 21600 Z N"/>
        </draw:custom-shape>
        <draw:custom-shape svg:x="5.2in" svg:y="1.32909in" svg:width="4.4in" svg:height="0.45in" draw:id="id234" draw:style-name="a915" draw:name="Text 13">
          <svg:title/>
          <svg:desc/>
          <text:p text:style-name="a912" text:class-names="" text:cond-style-name=""><text:span text:style-name="a911" text:class-names="">Diagramme de classes</text:span></text:p>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custom-shape>
        <draw:frame draw:id="id235" draw:style-name="a916" draw:name="Picture 26" svg:x="0.40896in" svg:y="1.69181in" svg:width="4.3922in" svg:height="3.68535in" style:rel-width="scale" style:rel-height="scale">
          <draw:image xlink:href="media/image4.jpeg" xlink:type="simple" xlink:show="embed" xlink:actuate="onLoad"/>
          <svg:title/>
          <svg:desc>A diagram of a person&amp;#39;s relationship

AI-generated content may be incorrect.</svg:desc>
        </draw:frame>
        <draw:frame draw:id="id236" draw:style-name="a917" draw:name="Picture 28" svg:x="5.64152in" svg:y="1.69217in" svg:width="3.52299in" svg:height="3.56609in" style:rel-width="scale" style:rel-height="scale">
          <draw:image xlink:href="media/image5.png" xlink:type="simple" xlink:show="embed" xlink:actuate="onLoad"/>
          <svg:title/>
          <svg:desc>A diagram of a work flow

AI-generated content may be incorrect.</svg:desc>
        </draw:frame>
        <presentation:notes draw:style-name="a925">
          <draw:page-thumbnail draw:page-number="10" svg:x="-0.1875in" svg:y="1.25in" svg:width="6in" svg:height="3.375in" presentation:class="page" draw:id="id237" presentation:style-name="a918" draw:name="Slide Image Placeholder 1">
            <svg:title/>
            <svg:desc/>
          </draw:page-thumbnail>
          <draw:frame draw:id="id238" presentation:style-name="a921" draw:name="Notes Placeholder 2" svg:x="0.5625in" svg:y="4.8125in" svg:width="4.5in" svg:height="3.9375in" presentation:class="notes" presentation:placeholder="false">
            <draw:text-box>
              <text:p text:style-name="a920" text:class-names="" text:cond-style-name=""><text:span text:style-name="a919" text:class-names="">Le diagramme de cas d'usage montre trois acteurs : Joueur, Responsable d'équipe et Admin. La relation include entre Réserver terrain et Voir disponibilité est un élément clé. Le diagramme de classes reflète exactement les 4 modèles Django avec leurs attributs typés.</text:span></text:p>
            </draw:text-box>
            <svg:title/>
            <svg:desc/>
          </draw:frame>
          <draw:frame draw:id="id239" presentation:style-name="a924" draw:name="Slide Number Placeholder 3" svg:x="3.18576in" svg:y="9.49826in" svg:width="2.4375in" svg:height="0.50174in" presentation:class="page-number" presentation:placeholder="false">
            <draw:text-box>
              <text:p text:style-name="a923" text:class-names="" text:cond-style-name=""><text:span text:style-name="a922" text:class-names=""><text:page-number style:num-format="1" text:fixed="false">10</text:page-number></text:span></text:p>
            </draw:text-box>
            <svg:title/>
            <svg:desc/>
          </draw:frame>
        </presentation:notes>
      </draw:page>
      <draw:page draw:name="Slide 11" draw:style-name="a926" draw:master-page-name="Master1-Layout1-cust-DEFAULT" presentation:presentation-page-layout-name="Master1-PPL1" draw:id="Slide-266">
        <draw:custom-shape svg:x="0in" svg:y="0in" svg:width="10in" svg:height="0.08in" draw:id="id240" draw:style-name="a927" draw:name="Shape 0">
          <svg:title/>
          <svg:desc/>
          <draw:enhanced-geometry xmlns:dr3d="urn:oasis:names:tc:opendocument:xmlns:dr3d:1.0" draw:type="non-primitive" svg:viewBox="0 0 21600 21600" draw:enhanced-path="M 0 0 L 21600 0 21600 21600 0 21600 Z N"/>
        </draw:custom-shape>
        <draw:custom-shape svg:x="0.5in" svg:y="0.22in" svg:width="9in" svg:height="0.38in" draw:id="id241" draw:style-name="a931" draw:name="Text 1">
          <svg:title/>
          <svg:desc/>
          <text:p text:style-name="a930" text:class-names="" text:cond-style-name=""><text:span text:style-name="a928" text:class-names="">10 — ANALYSE CRITIQUE</text:span><text:span text:style-name="a929" text:class-names=""/></text:p>
          <draw:enhanced-geometry xmlns:dr3d="urn:oasis:names:tc:opendocument:xmlns:dr3d:1.0" draw:type="non-primitive" svg:viewBox="0 0 21600 21600" draw:enhanced-path="M 0 0 L 21600 0 21600 21600 0 21600 Z N"/>
        </draw:custom-shape>
        <draw:custom-shape svg:x="0.5in" svg:y="0.65in" svg:width="9in" svg:height="0.6in" draw:id="id242" draw:style-name="a935" draw:name="Text 2">
          <svg:title/>
          <svg:desc/>
          <text:p text:style-name="a934" text:class-names="" text:cond-style-name=""><text:span text:style-name="a932" text:class-names="">Forces · Perspectives d'Évolution</text:span><text:span text:style-name="a933" text:class-names=""/></text:p>
          <draw:enhanced-geometry xmlns:dr3d="urn:oasis:names:tc:opendocument:xmlns:dr3d:1.0" draw:type="non-primitive" svg:viewBox="0 0 21600 21600" draw:enhanced-path="M 0 0 L 21600 0 21600 21600 0 21600 Z N"/>
        </draw:custom-shape>
        <draw:custom-shape svg:x="0.4in" svg:y="1.55in" svg:width="4.3in" svg:height="3.6in" draw:id="id243" draw:style-name="a936" draw:name="Shape 3">
          <svg:title/>
          <svg:desc/>
          <draw:enhanced-geometry xmlns:dr3d="urn:oasis:names:tc:opendocument:xmlns:dr3d:1.0" draw:type="non-primitive" svg:viewBox="0 0 21600 21600" draw:enhanced-path="M 0 0 L 21600 0 21600 21600 0 21600 Z N"/>
        </draw:custom-shape>
        <draw:custom-shape svg:x="0.4in" svg:y="1.55in" svg:width="4.3in" svg:height="0.48in" draw:id="id244" draw:style-name="a937" draw:name="Shape 4">
          <svg:title/>
          <svg:desc/>
          <draw:enhanced-geometry xmlns:dr3d="urn:oasis:names:tc:opendocument:xmlns:dr3d:1.0" draw:type="non-primitive" svg:viewBox="0 0 21600 21600" draw:enhanced-path="M 0 0 L 21600 0 21600 21600 0 21600 Z N"/>
        </draw:custom-shape>
        <draw:custom-shape svg:x="0.4in" svg:y="1.55in" svg:width="4.3in" svg:height="0.48in" draw:id="id245" draw:style-name="a941" draw:name="Text 5">
          <svg:title/>
          <svg:desc/>
          <text:p text:style-name="a940" text:class-names="" text:cond-style-name=""><text:span text:style-name="a938" text:class-names=""><text:s text:c="2"/>Points Forts</text:span><text:span text:style-name="a939" text:class-names=""/></text:p>
          <draw:enhanced-geometry xmlns:dr3d="urn:oasis:names:tc:opendocument:xmlns:dr3d:1.0" draw:type="non-primitive" svg:viewBox="0 0 21600 21600" draw:enhanced-path="M 0 0 L 21600 0 21600 21600 0 21600 Z N"/>
        </draw:custom-shape>
        <draw:custom-shape svg:x="0.6in" svg:y="1.94545in" svg:width="3.9in" svg:height="2.8in" draw:id="id246" draw:style-name="a972" draw:name="Text 6">
          <svg:title/>
          <svg:desc/>
          <text:p text:style-name="a943" text:class-names="" text:cond-style-name=""><text:span text:style-name="a942" text:class-names=""/></text:p>
          <text:list text:style-name="a947">
            <text:list-item>
              <text:p text:style-name="a946" text:class-names="" text:cond-style-name=""><text:span text:style-name="a944" text:class-names="">Double validation anti-chevauchement</text:span><text:span text:style-name="a945" text:class-names=""/></text:p>
            </text:list-item>
          </text:list>
          <text:list text:style-name="a952">
            <text:list-item>
              <text:p text:style-name="a951" text:class-names="" text:cond-style-name=""><text:span text:style-name="a948" text:class-names="">Administration riche et<text:s text:c="1"/></text:span><text:span text:style-name="a949" text:class-names="">opérationnelle</text:span><text:span text:style-name="a950" text:class-names=""/></text:p>
            </text:list-item>
          </text:list>
          <text:list text:style-name="a956">
            <text:list-item>
              <text:p text:style-name="a955" text:class-names="" text:cond-style-name=""><text:span text:style-name="a953" text:class-names="">Design responsive Bootstrap 5</text:span><text:span text:style-name="a954" text:class-names=""/></text:p>
            </text:list-item>
          </text:list>
          <text:list text:style-name="a964">
            <text:list-item>
              <text:p text:style-name="a963" text:class-names="" text:cond-style-name=""><text:span text:style-name="a957" text:class-names="">Filtrage</text:span><text:span text:style-name="a958" text:class-names=""><text:s text:c="1"/>multi-</text:span><text:span text:style-name="a959" text:class-names="">critères</text:span><text:span text:style-name="a960" text:class-names=""><text:s text:c="1"/></text:span><text:span text:style-name="a961" text:class-names="">efficace</text:span><text:span text:style-name="a962" text:class-names=""/></text:p>
            </text:list-item>
          </text:list>
          <text:list text:style-name="a971">
            <text:list-item>
              <text:p text:style-name="a970" text:class-names="" text:cond-style-name=""><text:span text:style-name="a965" text:class-names="">Code bien<text:s text:c="1"/></text:span><text:span text:style-name="a966" text:class-names="">structuré</text:span><text:span text:style-name="a967" text:class-names=""><text:s text:c="1"/>et<text:s text:c="1"/></text:span><text:span text:style-name="a968" text:class-names="">maintenable</text:span><text:span text:style-name="a969" text:class-names=""/></text:p>
            </text:list-item>
          </text:list>
          <draw:enhanced-geometry xmlns:dr3d="urn:oasis:names:tc:opendocument:xmlns:dr3d:1.0" draw:type="non-primitive" svg:viewBox="0 0 21600 21600" draw:enhanced-path="M 0 0 L 21600 0 21600 21600 0 21600 Z N"/>
        </draw:custom-shape>
        <draw:custom-shape svg:x="5.3in" svg:y="1.55in" svg:width="4.3in" svg:height="3.6in" draw:id="id247" draw:style-name="a973" draw:name="Shape 7">
          <svg:title/>
          <svg:desc/>
          <draw:enhanced-geometry xmlns:dr3d="urn:oasis:names:tc:opendocument:xmlns:dr3d:1.0" draw:type="non-primitive" svg:viewBox="0 0 21600 21600" draw:enhanced-path="M 0 0 L 21600 0 21600 21600 0 21600 Z N"/>
        </draw:custom-shape>
        <draw:custom-shape svg:x="5.3in" svg:y="1.55in" svg:width="4.3in" svg:height="0.48in" draw:id="id248" draw:style-name="a974" draw:name="Shape 8">
          <svg:title/>
          <svg:desc/>
          <draw:enhanced-geometry xmlns:dr3d="urn:oasis:names:tc:opendocument:xmlns:dr3d:1.0" draw:type="non-primitive" svg:viewBox="0 0 21600 21600" draw:enhanced-path="M 0 0 L 21600 0 21600 21600 0 21600 Z N"/>
        </draw:custom-shape>
        <draw:custom-shape svg:x="5.3in" svg:y="1.55in" svg:width="4.3in" svg:height="0.48in" draw:id="id249" draw:style-name="a981" draw:name="Text 9">
          <svg:title/>
          <svg:desc/>
          <text:p text:style-name="a980" text:class-names="" text:cond-style-name=""><text:span text:style-name="a975" text:class-names=""><text:s text:c="2"/></text:span><text:span text:style-name="a976" text:class-names="">Évolutions</text:span><text:span text:style-name="a977" text:class-names=""><text:s text:c="1"/></text:span><text:span text:style-name="a978" text:class-names="">Suggérées</text:span><text:span text:style-name="a979" text:class-names=""/></text:p>
          <draw:enhanced-geometry xmlns:dr3d="urn:oasis:names:tc:opendocument:xmlns:dr3d:1.0" draw:type="non-primitive" svg:viewBox="0 0 21600 21600" draw:enhanced-path="M 0 0 L 21600 0 21600 21600 0 21600 Z N"/>
        </draw:custom-shape>
        <draw:custom-shape svg:x="5.5in" svg:y="2.25795in" svg:width="3.9in" svg:height="2.8in" draw:id="id250" draw:style-name="a1009" draw:name="Text 10">
          <svg:title/>
          <svg:desc/>
          <text:list text:style-name="a988">
            <text:list-item>
              <text:p text:style-name="a987" text:class-names="" text:cond-style-name=""><text:span text:style-name="a982" text:class-names="">Authentification</text:span><text:span text:style-name="a983" text:class-names=""><text:s text:c="1"/></text:span><text:span text:style-name="a984" text:class-names="">utilisateur</text:span><text:span text:style-name="a985" text:class-names=""><text:s text:c="1"/>(JWT/Session)</text:span><text:span text:style-name="a986" text:class-names=""/></text:p>
            </text:list-item>
          </text:list>
          <text:list text:style-name="a997">
            <text:list-item>
              <text:p text:style-name="a996" text:class-names="" text:cond-style-name=""><text:span text:style-name="a989" text:class-names="">Système de<text:s text:c="1"/></text:span><text:span text:style-name="a990" text:class-names="">paiement</text:span><text:span text:style-name="a991" text:class-names=""><text:s text:c="1"/></text:span><text:span text:style-name="a992" text:class-names="">en</text:span><text:span text:style-name="a993" text:class-names=""><text:s text:c="1"/></text:span><text:span text:style-name="a994" text:class-names="">ligne</text:span><text:span text:style-name="a995" text:class-names=""/></text:p>
            </text:list-item>
          </text:list>
          <text:list text:style-name="a1001">
            <text:list-item>
              <text:p text:style-name="a1000" text:class-names="" text:cond-style-name=""><text:span text:style-name="a998" text:class-names="">Notifications email / SMS</text:span><text:span text:style-name="a999" text:class-names=""/></text:p>
            </text:list-item>
          </text:list>
          <text:list text:style-name="a1008">
            <text:list-item>
              <text:p text:style-name="a1007" text:class-names="" text:cond-style-name=""><text:span text:style-name="a1002" text:class-names="">Calendrier</text:span><text:span text:style-name="a1003" text:class-names=""><text:s text:c="1"/></text:span><text:span text:style-name="a1004" text:class-names="">visuel</text:span><text:span text:style-name="a1005" text:class-names=""><text:s text:c="1"/>FullCalendar.js</text:span><text:span text:style-name="a1006" text:class-names=""/></text:p>
            </text:list-item>
          </text:list>
          <draw:enhanced-geometry xmlns:dr3d="urn:oasis:names:tc:opendocument:xmlns:dr3d:1.0" draw:type="non-primitive" svg:viewBox="0 0 21600 21600" draw:enhanced-path="M 0 0 L 21600 0 21600 21600 0 21600 Z N"/>
        </draw:custom-shape>
        <presentation:notes draw:style-name="a1017">
          <draw:page-thumbnail draw:page-number="11" svg:x="-0.1875in" svg:y="1.25in" svg:width="6in" svg:height="3.375in" presentation:class="page" draw:id="id251" presentation:style-name="a1010" draw:name="Slide Image Placeholder 1">
            <svg:title/>
            <svg:desc/>
          </draw:page-thumbnail>
          <draw:frame draw:id="id252" presentation:style-name="a1013" draw:name="Notes Placeholder 2" svg:x="0.5625in" svg:y="4.8125in" svg:width="4.5in" svg:height="3.9375in" presentation:class="notes" presentation:placeholder="false">
            <draw:text-box>
              <text:p text:style-name="a1012" text:class-names="" text:cond-style-name=""><text:span text:style-name="a1011" text:class-names="">SportField présente de solides points forts : une architecture propre, une protection anti-chevauchement double couche, et un design professionnel. Les pistes d'évolution naturelles sont l'authentification, les paiements en ligne, et la migration vers une API REST pour une application mobile future.</text:span></text:p>
            </draw:text-box>
            <svg:title/>
            <svg:desc/>
          </draw:frame>
          <draw:frame draw:id="id253" presentation:style-name="a1016" draw:name="Slide Number Placeholder 3" svg:x="3.18576in" svg:y="9.49826in" svg:width="2.4375in" svg:height="0.50174in" presentation:class="page-number" presentation:placeholder="false">
            <draw:text-box>
              <text:p text:style-name="a1015" text:class-names="" text:cond-style-name=""><text:span text:style-name="a1014" text:class-names=""><text:page-number style:num-format="1" text:fixed="false">11</text:page-number></text:span></text:p>
            </draw:text-box>
            <svg:title/>
            <svg:desc/>
          </draw:frame>
        </presentation:notes>
      </draw:page>
      <draw:page draw:name="Slide 13" draw:style-name="a1018" draw:master-page-name="Master1-Layout1-cust-DEFAULT" presentation:presentation-page-layout-name="Master1-PPL1" draw:id="Slide-268">
        <draw:custom-shape svg:x="0in" svg:y="0in" svg:width="4.5in" svg:height="5.625in" draw:id="id254" draw:style-name="a1019" draw:name="Shape 0">
          <svg:title/>
          <svg:desc/>
          <draw:enhanced-geometry xmlns:dr3d="urn:oasis:names:tc:opendocument:xmlns:dr3d:1.0" draw:type="non-primitive" svg:viewBox="0 0 21600 21600" draw:enhanced-path="M 0 0 L 21600 0 21600 21600 0 21600 Z N"/>
        </draw:custom-shape>
        <draw:custom-shape svg:x="-0.8in" svg:y="3.5in" svg:width="3.5in" svg:height="3.5in" draw:id="id255" draw:style-name="a1020" draw:name="Shape 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8in" svg:y="-0.5in" svg:width="2in" svg:height="2in" draw:id="id256" draw:style-name="a1021" draw:name="Shape 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in" svg:y="1.3in" svg:width="4in" svg:height="2.5in" draw:id="id257" draw:style-name="a1028" draw:name="Text 3">
          <svg:title/>
          <svg:desc/>
          <text:p text:style-name="a1024" text:class-names="" text:cond-style-name=""><text:span text:style-name="a1022" text:class-names="">SPORT</text:span><text:span text:style-name="a1023" text:class-names=""/></text:p>
          <text:p text:style-name="a1027" text:class-names="" text:cond-style-name=""><text:span text:style-name="a1025" text:class-names="">FIELD</text:span><text:span text:style-name="a1026" text:class-names=""/></text:p>
          <draw:enhanced-geometry xmlns:dr3d="urn:oasis:names:tc:opendocument:xmlns:dr3d:1.0" draw:type="non-primitive" svg:viewBox="0 0 21600 21600" draw:enhanced-path="M 0 0 L 21600 0 21600 21600 0 21600 Z N"/>
        </draw:custom-shape>
        <draw:custom-shape svg:x="0.2in" svg:y="4in" svg:width="4in" svg:height="0.4in" draw:id="id258" draw:style-name="a1031" draw:name="Text 4">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custom-shape svg:x="5in" svg:y="0.55in" svg:width="4.5in" svg:height="0.5in" draw:id="id259" draw:style-name="a1035" draw:name="Text 5">
          <svg:title/>
          <svg:desc/>
          <text:p text:style-name="a1034" text:class-names="" text:cond-style-name=""><text:span text:style-name="a1032" text:class-names="">CONCLUSION</text:span><text:span text:style-name="a1033" text:class-names=""/></text:p>
          <draw:enhanced-geometry xmlns:dr3d="urn:oasis:names:tc:opendocument:xmlns:dr3d:1.0" draw:type="non-primitive" svg:viewBox="0 0 21600 21600" draw:enhanced-path="M 0 0 L 21600 0 21600 21600 0 21600 Z N"/>
        </draw:custom-shape>
        <draw:custom-shape svg:x="5in" svg:y="1.1in" svg:width="4.5in" svg:height="1.3in" draw:id="id260" draw:style-name="a1042" draw:name="Text 6">
          <svg:title/>
          <svg:desc/>
          <text:p text:style-name="a1038" text:class-names="" text:cond-style-name=""><text:span text:style-name="a1036" text:class-names="">Un projet fonctionnel,</text:span><text:span text:style-name="a1037" text:class-names=""/></text:p>
          <text:p text:style-name="a1041" text:class-names="" text:cond-style-name=""><text:span text:style-name="a1039" text:class-names="">bien structuré et extensible.</text:span><text:span text:style-name="a1040" text:class-names=""/></text:p>
          <draw:enhanced-geometry xmlns:dr3d="urn:oasis:names:tc:opendocument:xmlns:dr3d:1.0" draw:type="non-primitive" svg:viewBox="0 0 21600 21600" draw:enhanced-path="M 0 0 L 21600 0 21600 21600 0 21600 Z N"/>
        </draw:custom-shape>
        <draw:custom-shape svg:x="5in" svg:y="2.55in" svg:width="1.3in" svg:height="0.92in" draw:id="id261" draw:style-name="a1043" draw:name="Shape 7">
          <svg:title/>
          <svg:desc/>
          <draw:enhanced-geometry xmlns:dr3d="urn:oasis:names:tc:opendocument:xmlns:dr3d:1.0" draw:type="non-primitive" svg:viewBox="0 0 21600 21600" draw:enhanced-path="M 0 0 L 21600 0 21600 21600 0 21600 Z N"/>
        </draw:custom-shape>
        <draw:custom-shape svg:x="5in" svg:y="2.58in" svg:width="1.3in" svg:height="0.48in" draw:id="id262" draw:style-name="a1047" draw:name="Text 8">
          <svg:title/>
          <svg:desc/>
          <text:p text:style-name="a1046" text:class-names="" text:cond-style-name=""><text:span text:style-name="a1044" text:class-names="">4</text:span><text:span text:style-name="a1045" text:class-names=""/></text:p>
          <draw:enhanced-geometry xmlns:dr3d="urn:oasis:names:tc:opendocument:xmlns:dr3d:1.0" draw:type="non-primitive" svg:viewBox="0 0 21600 21600" draw:enhanced-path="M 0 0 L 21600 0 21600 21600 0 21600 Z N"/>
        </draw:custom-shape>
        <draw:custom-shape svg:x="5in" svg:y="3.05in" svg:width="1.3in" svg:height="0.3in" draw:id="id263" draw:style-name="a1051" draw:name="Text 9">
          <svg:title/>
          <svg:desc/>
          <text:p text:style-name="a1050" text:class-names="" text:cond-style-name=""><text:span text:style-name="a1048" text:class-names="">Modules</text:span><text:span text:style-name="a1049" text:class-names=""/></text:p>
          <draw:enhanced-geometry xmlns:dr3d="urn:oasis:names:tc:opendocument:xmlns:dr3d:1.0" draw:type="non-primitive" svg:viewBox="0 0 21600 21600" draw:enhanced-path="M 0 0 L 21600 0 21600 21600 0 21600 Z N"/>
        </draw:custom-shape>
        <draw:custom-shape svg:x="6.55in" svg:y="2.55in" svg:width="1.3in" svg:height="0.92in" draw:id="id264" draw:style-name="a1052" draw:name="Shape 10">
          <svg:title/>
          <svg:desc/>
          <draw:enhanced-geometry xmlns:dr3d="urn:oasis:names:tc:opendocument:xmlns:dr3d:1.0" draw:type="non-primitive" svg:viewBox="0 0 21600 21600" draw:enhanced-path="M 0 0 L 21600 0 21600 21600 0 21600 Z N"/>
        </draw:custom-shape>
        <draw:custom-shape svg:x="6.55in" svg:y="2.58in" svg:width="1.3in" svg:height="0.48in" draw:id="id265" draw:style-name="a1056" draw:name="Text 11">
          <svg:title/>
          <svg:desc/>
          <text:p text:style-name="a1055" text:class-names="" text:cond-style-name=""><text:span text:style-name="a1053" text:class-names="">6</text:span><text:span text:style-name="a1054" text:class-names=""/></text:p>
          <draw:enhanced-geometry xmlns:dr3d="urn:oasis:names:tc:opendocument:xmlns:dr3d:1.0" draw:type="non-primitive" svg:viewBox="0 0 21600 21600" draw:enhanced-path="M 0 0 L 21600 0 21600 21600 0 21600 Z N"/>
        </draw:custom-shape>
        <draw:custom-shape svg:x="6.55in" svg:y="3.05in" svg:width="1.3in" svg:height="0.3in" draw:id="id266" draw:style-name="a1060" draw:name="Text 12">
          <svg:title/>
          <svg:desc/>
          <text:p text:style-name="a1059" text:class-names="" text:cond-style-name=""><text:span text:style-name="a1057" text:class-names="">Vues</text:span><text:span text:style-name="a1058" text:class-names=""/></text:p>
          <draw:enhanced-geometry xmlns:dr3d="urn:oasis:names:tc:opendocument:xmlns:dr3d:1.0" draw:type="non-primitive" svg:viewBox="0 0 21600 21600" draw:enhanced-path="M 0 0 L 21600 0 21600 21600 0 21600 Z N"/>
        </draw:custom-shape>
        <draw:custom-shape svg:x="8.1in" svg:y="2.55in" svg:width="1.3in" svg:height="0.92in" draw:id="id267" draw:style-name="a1061" draw:name="Shape 13">
          <svg:title/>
          <svg:desc/>
          <draw:enhanced-geometry xmlns:dr3d="urn:oasis:names:tc:opendocument:xmlns:dr3d:1.0" draw:type="non-primitive" svg:viewBox="0 0 21600 21600" draw:enhanced-path="M 0 0 L 21600 0 21600 21600 0 21600 Z N"/>
        </draw:custom-shape>
        <draw:custom-shape svg:x="8.1in" svg:y="2.58in" svg:width="1.3in" svg:height="0.48in" draw:id="id268" draw:style-name="a1065" draw:name="Text 14">
          <svg:title/>
          <svg:desc/>
          <text:p text:style-name="a1064" text:class-names="" text:cond-style-name=""><text:span text:style-name="a1062" text:class-names="">7</text:span><text:span text:style-name="a1063" text:class-names=""/></text:p>
          <draw:enhanced-geometry xmlns:dr3d="urn:oasis:names:tc:opendocument:xmlns:dr3d:1.0" draw:type="non-primitive" svg:viewBox="0 0 21600 21600" draw:enhanced-path="M 0 0 L 21600 0 21600 21600 0 21600 Z N"/>
        </draw:custom-shape>
        <draw:custom-shape svg:x="8.1in" svg:y="3.05in" svg:width="1.3in" svg:height="0.3in" draw:id="id269" draw:style-name="a1069" draw:name="Text 15">
          <svg:title/>
          <svg:desc/>
          <text:p text:style-name="a1068" text:class-names="" text:cond-style-name=""><text:span text:style-name="a1066" text:class-names="">Templates</text:span><text:span text:style-name="a1067" text:class-names=""/></text:p>
          <draw:enhanced-geometry xmlns:dr3d="urn:oasis:names:tc:opendocument:xmlns:dr3d:1.0" draw:type="non-primitive" svg:viewBox="0 0 21600 21600" draw:enhanced-path="M 0 0 L 21600 0 21600 21600 0 21600 Z N"/>
        </draw:custom-shape>
        <draw:custom-shape svg:x="5in" svg:y="3.99773in" svg:width="4.6in" svg:height="0.35in" draw:id="id270" draw:style-name="a1073" draw:name="Text 17">
          <svg:title/>
          <svg:desc/>
          <text:p text:style-name="a1072" text:class-names="" text:cond-style-name=""><text:span text:style-name="a1070" text:class-names="">Merci pour votre attention.</text:span><text:span text:style-name="a1071" text:class-names=""/></text:p>
          <draw:enhanced-geometry xmlns:dr3d="urn:oasis:names:tc:opendocument:xmlns:dr3d:1.0" draw:type="non-primitive" svg:viewBox="0 0 21600 21600" draw:enhanced-path="M 0 0 L 21600 0 21600 21600 0 21600 Z N"/>
        </draw:custom-shape>
        <presentation:notes draw:style-name="a1081">
          <draw:page-thumbnail draw:page-number="12" svg:x="-0.1875in" svg:y="1.25in" svg:width="6in" svg:height="3.375in" presentation:class="page" draw:id="id271" presentation:style-name="a1074" draw:name="Slide Image Placeholder 1">
            <svg:title/>
            <svg:desc/>
          </draw:page-thumbnail>
          <draw:frame draw:id="id272" presentation:style-name="a1077" draw:name="Notes Placeholder 2" svg:x="0.5625in" svg:y="4.8125in" svg:width="4.5in" svg:height="3.9375in" presentation:class="notes" presentation:placeholder="false">
            <draw:text-box>
              <text:p text:style-name="a1076" text:class-names="" text:cond-style-name=""><text:span text:style-name="a1075" text:class-names="">Pour conclure, SportField est un projet académique solide qui démontre une maîtrise réelle du framework Django. La double validation anti-chevauchement est la pièce maîtresse du système. Les fondations sont là pour évoluer vers une plateforme de réservation complète avec API REST et application mobile. Merci pour votre attention, je suis disponible pour vos questions.</text:span></text:p>
            </draw:text-box>
            <svg:title/>
            <svg:desc/>
          </draw:frame>
          <draw:frame draw:id="id273" presentation:style-name="a1080" draw:name="Slide Number Placeholder 3" svg:x="3.18576in" svg:y="9.49826in" svg:width="2.4375in" svg:height="0.50174in" presentation:class="page-number" presentation:placeholder="false">
            <draw:text-box>
              <text:p text:style-name="a1079" text:class-names="" text:cond-style-name=""><text:span text:style-name="a1078" text:class-names=""><text:page-number style:num-format="1" text:fixed="false">12</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stroke-dash draw:name="a334" draw:display-name="LongDash" draw:style="rect" draw:dots1="1" draw:dots1-length="0.22222in" draw:dots2="0" draw:dots2-length="0in" draw:distance="0.02778in"/>
    <draw:stroke-dash draw:name="a336" draw:display-name="LongDash" draw:style="rect" draw:dots1="1" draw:dots1-length="0.22222in" draw:dots2="0" draw:dots2-length="0in" draw:distance="0.02778in"/>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5.625in" fo:page-height="10in" style:print-orientation="portrait" style:register-truth-ref-style-name=""/>
    </style:page-layout>
    <style:page-layout style:name="pageLayout3">
      <style:page-layout-properties fo:page-width="5.625in" fo:page-height="10in" style:print-orientation="portrait" style:register-truth-ref-style-name=""/>
    </style:page-layout>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presentation:notes style:page-layout-name="pageLayout2" draw:style-name="a31">
        <draw:frame draw:id="id0" presentation:style-name="a3" draw:name="Header Placeholder 1" svg:x="0in" svg:y="0in" svg:width="2.4375in" svg:height="0.50174in" presentation:class="header" presentation:placeholder="false">
          <draw:text-box>
            <text:p text:style-name="a2" text:class-names="" text:cond-style-name=""><text:span text:style-name="a1" text:class-names=""/></text:p>
          </draw:text-box>
          <svg:title/>
          <svg:desc/>
        </draw:frame>
        <draw:frame draw:id="id1" presentation:style-name="a7" draw:name="Date Placeholder 2" svg:x="3.18576in" svg:y="0in" svg:width="2.4375in" svg:height="0.50174in" presentation:class="date-time" presentation:placeholder="false">
          <draw:text-box>
            <text:p text:style-name="a6" text:class-names="" text:cond-style-name=""><text:span text:style-name="a4" text:class-names=""><text:date text:fixed="false" style:data-style-name="a5">5/5/2026</text:date></text:span></text:p>
          </draw:text-box>
          <svg:title/>
          <svg:desc/>
        </draw:frame>
        <draw:page-thumbnail svg:x="-0.1875in" svg:y="1.25in" svg:width="6in" svg:height="3.375in" presentation:class="page" draw:id="id2" presentation:style-name="a8" draw:name="Slide Image Placeholder 3">
          <svg:title/>
          <svg:desc/>
        </draw:page-thumbnail>
        <draw:frame draw:id="id3" presentation:style-name="a23" draw:name="Notes Placeholder 4" svg:x="0.5625in" svg:y="4.8125in" svg:width="4.5in" svg:height="3.9375in" presentation:class="notes" presentation:placeholder="false">
          <draw:text-box>
            <text:p text:style-name="a10" text:class-names="" text:cond-style-name=""><text:span text:style-name="a9" text:class-names="">Click to edit Master text styles</text:span></text:p>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4" presentation:style-name="a26" draw:name="Footer Placeholder 5" svg:x="0in" svg:y="9.49826in" svg:width="2.4375in" svg:height="0.50174in" presentation:class="footer" presentation:placeholder="false">
          <draw:text-box>
            <text:p text:style-name="a25" text:class-names="" text:cond-style-name=""><text:span text:style-name="a24" text:class-names=""/></text:p>
          </draw:text-box>
          <svg:title/>
          <svg:desc/>
        </draw:frame>
        <draw:frame draw:id="id5" presentation:style-name="a30" draw:name="Slide Number Placeholder 6" svg:x="3.18576in" svg:y="9.49826in" svg:width="2.4375in" svg:height="0.50174in" presentation:class="page-number" presentation:placeholder="false">
          <draw:text-box>
            <text:p text:style-name="a29" text:class-names="" text:cond-style-name=""><text:span text:style-name="a27" text:class-names=""><text:page-number style:num-format="1" text:fixed="false">‹#›</text:page-number></text:span><text:span text:style-name="a28" text:class-names=""/></text:p>
          </draw:text-box>
          <svg:title/>
          <svg:desc/>
        </draw:frame>
      </presentation:notes>
    </style:master-page>
    <style:master-page style:name="Master1-Layout1-cust-DEFAULT" style:page-layout-name="pageLayout1" draw:style-name="a32">
      <presentation:notes style:page-layout-name="pageLayout2" draw:style-name="a63">
        <draw:frame draw:id="id0" presentation:style-name="a35" draw:name="Header Placeholder 1" svg:x="0in" svg:y="0in" svg:width="2.4375in" svg:height="0.50174in" presentation:class="header" presentation:placeholder="false">
          <draw:text-box>
            <text:p text:style-name="a34" text:class-names="" text:cond-style-name=""><text:span text:style-name="a33" text:class-names=""/></text:p>
          </draw:text-box>
          <svg:title/>
          <svg:desc/>
        </draw:frame>
        <draw:frame draw:id="id1" presentation:style-name="a39" draw:name="Date Placeholder 2" svg:x="3.18576in" svg:y="0in" svg:width="2.4375in" svg:height="0.50174in" presentation:class="date-time" presentation:placeholder="false">
          <draw:text-box>
            <text:p text:style-name="a38" text:class-names="" text:cond-style-name=""><text:span text:style-name="a36" text:class-names=""><text:date text:fixed="false" style:data-style-name="a37">5/5/2026</text:date></text:span></text:p>
          </draw:text-box>
          <svg:title/>
          <svg:desc/>
        </draw:frame>
        <draw:page-thumbnail svg:x="-0.1875in" svg:y="1.25in" svg:width="6in" svg:height="3.375in" presentation:class="page" draw:id="id2" presentation:style-name="a40" draw:name="Slide Image Placeholder 3">
          <svg:title/>
          <svg:desc/>
        </draw:page-thumbnail>
        <draw:frame draw:id="id3" presentation:style-name="a55" draw:name="Notes Placeholder 4" svg:x="0.5625in" svg:y="4.8125in" svg:width="4.5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4" presentation:style-name="a58" draw:name="Footer Placeholder 5" svg:x="0in" svg:y="9.49826in" svg:width="2.4375in" svg:height="0.50174in" presentation:class="footer" presentation:placeholder="false">
          <draw:text-box>
            <text:p text:style-name="a57" text:class-names="" text:cond-style-name=""><text:span text:style-name="a56" text:class-names=""/></text:p>
          </draw:text-box>
          <svg:title/>
          <svg:desc/>
        </draw:frame>
        <draw:frame draw:id="id5" presentation:style-name="a62" draw:name="Slide Number Placeholder 6" svg:x="3.18576in" svg:y="9.49826in" svg:width="2.437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portField — Rapport Technique</dc:title>
    <dc:subject>PptxGenJS Presentation</dc:subject>
    <meta:initial-creator>PptxGenJS</meta:initial-creator>
    <dc:creator>PptxGenJS</dc:creator>
    <meta:creation-date>2026-05-05T11:16:41Z</meta:creation-date>
    <dc:date>2026-05-08T21:55:40Z</dc:date>
    <meta:editing-cycles>116</meta:editing-cycles>
    <meta:editing-duration>PT0S</meta:editing-duration>
    <meta:document-statistic meta:paragraph-count="0" meta:word-count="0"/>
  </office:meta>
</office:document-meta>
</file>